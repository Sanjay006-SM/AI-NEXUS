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5222in" table:align="left"/>
    </style:style>
    <style:style style:name="Table2.A" style:family="table-column">
      <style:table-column-properties style:column-width="1.0271in"/>
    </style:style>
    <style:style style:name="Table2.B" style:family="table-column">
      <style:table-column-properties style:column-width="1.7569in"/>
    </style:style>
    <style:style style:name="Table2.C" style:family="table-column">
      <style:table-column-properties style:column-width="3.7382in"/>
    </style:style>
    <style:style style:name="Table2.A1" style:family="table-cell">
      <style:table-cell-properties style:vertical-align="middle" fo:padding="0.0194in" fo:border="none"/>
    </style:style>
    <style:style style:name="Table1" style:family="table">
      <style:table-properties style:width="6.6931in" table:align="left"/>
    </style:style>
    <style:style style:name="Table1.A" style:family="table-column">
      <style:table-column-properties style:column-width="1.5521in"/>
    </style:style>
    <style:style style:name="Table1.B" style:family="table-column">
      <style:table-column-properties style:column-width="5.141in"/>
    </style:style>
    <style:style style:name="Table1.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1.1424in"/>
    </style:style>
    <style:style style:name="Table3.B" style:family="table-column">
      <style:table-column-properties style:column-width="5.5507in"/>
    </style:style>
    <style:style style:name="Table3.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8">
      <style:paragraph-properties fo:margin-top="0in" fo:margin-bottom="0in" style:contextual-spacing="false"/>
    </style:style>
    <style:style style:name="P51" style:family="paragraph" style:parent-style-name="Text_20_body" style:list-style-name="L49"/>
    <style:style style:name="P52" style:family="paragraph" style:parent-style-name="Text_20_body" style:list-style-name="L49">
      <style:paragraph-properties fo:margin-top="0in" fo:margin-bottom="0in" style:contextual-spacing="false"/>
    </style:style>
    <style:style style:name="P53" style:family="paragraph" style:parent-style-name="Text_20_body" style:list-style-name="L50"/>
    <style:style style:name="P54" style:family="paragraph" style:parent-style-name="Text_20_body" style:list-style-name="L50">
      <style:paragraph-properties fo:margin-top="0in" fo:margin-bottom="0in" style:contextual-spacing="false"/>
    </style:style>
    <style:style style:name="P55" style:family="paragraph" style:parent-style-name="Text_20_body" style:list-style-name="L51"/>
    <style:style style:name="P56" style:family="paragraph" style:parent-style-name="Text_20_body" style:list-style-name="L51">
      <style:paragraph-properties fo:margin-top="0in" fo:margin-bottom="0in" style:contextual-spacing="false"/>
    </style:style>
    <style:style style:name="T1" style:family="text">
      <style:text-properties officeooo:rsid="0022278e"/>
    </style:style>
    <style:style style:name="T2" style:family="text">
      <style:text-properties fo:font-size="22pt" officeooo:rsid="0022278e" style:font-size-asian="22pt" style:font-size-complex="22pt"/>
    </style:style>
    <style:style style:name="T3" style:family="text">
      <style:text-properties fo:font-size="22pt" fo:font-weight="bold" officeooo:rsid="0022278e" style:font-size-asian="22pt" style:font-weight-asian="bold" style:font-size-complex="22pt"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 for a presentation, you don't want paragraphs—you want <text:span text:style-name="Strong_20_Emphasis">speaker hints</text:span> that trigger your memory. Here's a concise version you can paste into Word.</text:p>
      <text:p text:style-name="Horizontal_20_Line"/>
      <text:h text:style-name="Heading_20_1" text:outline-level="1"><text:span text:style-name="Strong_20_Emphasis">Stage 1 – Enterprise Data Ingestion Engine</text:span></text:h>
      <text:h text:style-name="Heading_20_3" text:outline-level="3"><text:span text:style-name="Strong_20_Emphasis">Objective</text:span></text:h>
      <text:list text:style-name="L1">
        <text:list-item>
          <text:p text:style-name="P2">Collect security data</text:p>
        </text:list-item>
        <text:list-item>
          <text:p text:style-name="P2">Validate</text:p>
        </text:list-item>
        <text:list-item>
          <text:p text:style-name="P2">Remove duplicates</text:p>
        </text:list-item>
        <text:list-item>
          <text:p text:style-name="P2">Add metadata</text:p>
        </text:list-item>
        <text:list-item>
          <text:p text:style-name="P2">Send to Kafka</text:p>
        </text:list-item>
        <text:list-item>
          <text:p text:style-name="P2"><text:span text:style-name="Strong_20_Emphasis">No AI / No Analysis</text:span></text:p>
        </text:list-item>
      </text:list>
      <text:p text:style-name="Text_20_body"><text:span text:style-name="Strong_20_Emphasis">Remember:</text:span><text:line-break/>➡️ <text:span text:style-name="Strong_20_Emphasis">Collect → Validate → Deduplicate → Enrich → Publish</text:span></text:p>
      <text:p text:style-name="Horizontal_20_Line"/>
      <text:h text:style-name="Heading_20_1" text:outline-level="1"><text:span text:style-name="Strong_20_Emphasis">Overall Flow</text:span></text:h>
      <text:p text:style-name="Preformatted_20_Text"><text:span text:style-name="Source_20_Text">Security Products</text:span></text:p>
      <text:p text:style-name="Preformatted_20_Text"><text:span text:style-name="Source_20_Text"><text:s text:c="6"/>↓</text:span></text:p>
      <text:p text:style-name="Preformatted_20_Text"><text:span text:style-name="Source_20_Text">Connector</text:span></text:p>
      <text:p text:style-name="Preformatted_20_Text"><text:span text:style-name="Source_20_Text"><text:s text:c="6"/>↓</text:span></text:p>
      <text:p text:style-name="Preformatted_20_Text"><text:span text:style-name="Source_20_Text">Authentication</text:span></text:p>
      <text:p text:style-name="Preformatted_20_Text"><text:span text:style-name="Source_20_Text"><text:s text:c="6"/>↓</text:span></text:p>
      <text:p text:style-name="Preformatted_20_Text"><text:span text:style-name="Source_20_Text">Scheduler / Webhook</text:span></text:p>
      <text:p text:style-name="Preformatted_20_Text"><text:span text:style-name="Source_20_Text"><text:s text:c="6"/>↓</text:span></text:p>
      <text:p text:style-name="Preformatted_20_Text"><text:span text:style-name="Source_20_Text">Data Collector</text:span></text:p>
      <text:p text:style-name="Preformatted_20_Text"><text:span text:style-name="Source_20_Text"><text:s text:c="6"/>↓</text:span></text:p>
      <text:p text:style-name="Preformatted_20_Text"><text:span text:style-name="Source_20_Text">Validator</text:span></text:p>
      <text:p text:style-name="Preformatted_20_Text"><text:span text:style-name="Source_20_Text"><text:s text:c="6"/>↓</text:span></text:p>
      <text:p text:style-name="Preformatted_20_Text"><text:span text:style-name="Source_20_Text">Deduplication</text:span></text:p>
      <text:p text:style-name="Preformatted_20_Text"><text:span text:style-name="Source_20_Text"><text:s text:c="6"/>↓</text:span></text:p>
      <text:p text:style-name="Preformatted_20_Text"><text:span text:style-name="Source_20_Text">Metadata</text:span></text:p>
      <text:p text:style-name="Preformatted_20_Text"><text:span text:style-name="Source_20_Text"><text:s text:c="6"/>↓</text:span></text:p>
      <text:p text:style-name="Preformatted_20_Text"><text:span text:style-name="Source_20_Text">Kafka</text:span></text:p>
      <text:p text:style-name="Preformatted_20_Text"><text:span text:style-name="Source_20_Text"><text:s text:c="6"/>↓</text:span></text:p>
      <text:p text:style-name="P1"><text:span text:style-name="Source_20_Text">Stage 2</text:span></text:p>
      <text:p text:style-name="Horizontal_20_Line"/>
      <text:h text:style-name="Heading_20_1" text:outline-level="1"><text:span text:style-name="Strong_20_Emphasis">1. Connector Manager</text:span></text:h>
      <text:p text:style-name="Text_20_body"><text:span text:style-name="Strong_20_Emphasis">Purpose</text:span></text:p>
      <text:list text:style-name="L2">
        <text:list-item>
          <text:p text:style-name="P3">Manage integrations</text:p>
        </text:list-item>
        <text:list-item>
          <text:p text:style-name="P3"><text:soft-page-break/>Store API details</text:p>
        </text:list-item>
        <text:list-item>
          <text:p text:style-name="P3">Enable/Disable connectors</text:p>
        </text:list-item>
      </text:list>
      <text:p text:style-name="Text_20_body"><text:span text:style-name="Strong_20_Emphasis">Keywords</text:span></text:p>
      <text:list text:style-name="L3">
        <text:list-item>
          <text:p text:style-name="P4">API URL</text:p>
        </text:list-item>
        <text:list-item>
          <text:p text:style-name="P4">Polling Interval</text:p>
        </text:list-item>
        <text:list-item>
          <text:p text:style-name="P4">Status</text:p>
        </text:list-item>
      </text:list>
      <text:p text:style-name="Text_20_body"><text:span text:style-name="Strong_20_Emphasis">One Line</text:span></text:p>
      <text:p text:style-name="Quotations">"Acts as the directory of all connected security products."</text:p>
      <text:p text:style-name="Horizontal_20_Line"/>
      <text:h text:style-name="Heading_20_1" text:outline-level="1"><text:span text:style-name="Strong_20_Emphasis">2. Authentication Manager</text:span></text:h>
      <text:p text:style-name="Text_20_body"><text:span text:style-name="Strong_20_Emphasis">Purpose</text:span></text:p>
      <text:list text:style-name="L4">
        <text:list-item>
          <text:p text:style-name="P5">Login to APIs</text:p>
        </text:list-item>
        <text:list-item>
          <text:p text:style-name="P5">Store credentials</text:p>
        </text:list-item>
        <text:list-item>
          <text:p text:style-name="P5">Refresh expired tokens</text:p>
        </text:list-item>
      </text:list>
      <text:p text:style-name="Text_20_body"><text:span text:style-name="Strong_20_Emphasis">Keywords</text:span></text:p>
      <text:list text:style-name="L5">
        <text:list-item>
          <text:p text:style-name="P6">API Key</text:p>
        </text:list-item>
        <text:list-item>
          <text:p text:style-name="P6">OAuth</text:p>
        </text:list-item>
        <text:list-item>
          <text:p text:style-name="P6">Token Refresh</text:p>
        </text:list-item>
      </text:list>
      <text:p text:style-name="Text_20_body"><text:span text:style-name="Strong_20_Emphasis">One Line</text:span></text:p>
      <text:p text:style-name="Quotations">"Handles secure authentication for every connector."</text:p>
      <text:p text:style-name="Horizontal_20_Line"/>
      <text:h text:style-name="Heading_20_1" text:outline-level="1"><text:span text:style-name="Strong_20_Emphasis">3. Scheduler</text:span></text:h>
      <text:p text:style-name="Text_20_body"><text:span text:style-name="Strong_20_Emphasis">Purpose</text:span></text:p>
      <text:list text:style-name="L6">
        <text:list-item>
          <text:p text:style-name="P7">Runs every few minutes</text:p>
        </text:list-item>
        <text:list-item>
          <text:p text:style-name="P7">Starts data collection</text:p>
        </text:list-item>
      </text:list>
      <text:p text:style-name="Text_20_body"><text:span text:style-name="Strong_20_Emphasis">Keywords</text:span></text:p>
      <text:list text:style-name="L7">
        <text:list-item>
          <text:p text:style-name="P8">APScheduler</text:p>
        </text:list-item>
        <text:list-item>
          <text:p text:style-name="P8">AsyncIO</text:p>
        </text:list-item>
        <text:list-item>
          <text:p text:style-name="P8">Polling</text:p>
        </text:list-item>
      </text:list>
      <text:p text:style-name="Text_20_body"><text:soft-page-break/><text:span text:style-name="Strong_20_Emphasis">One Line</text:span></text:p>
      <text:p text:style-name="Quotations">"Automatically collects data at fixed intervals."</text:p>
      <text:p text:style-name="Horizontal_20_Line"/>
      <text:h text:style-name="Heading_20_1" text:outline-level="1"><text:span text:style-name="Strong_20_Emphasis">4. Webhook Listener</text:span></text:h>
      <text:p text:style-name="Text_20_body"><text:span text:style-name="Strong_20_Emphasis">Purpose</text:span></text:p>
      <text:list text:style-name="L8">
        <text:list-item>
          <text:p text:style-name="P9">Receive instant alerts</text:p>
        </text:list-item>
      </text:list>
      <text:p text:style-name="Text_20_body"><text:span text:style-name="Strong_20_Emphasis">Keywords</text:span></text:p>
      <text:list text:style-name="L9">
        <text:list-item>
          <text:p text:style-name="P10">HTTP POST</text:p>
        </text:list-item>
        <text:list-item>
          <text:p text:style-name="P10">FastAPI</text:p>
        </text:list-item>
        <text:list-item>
          <text:p text:style-name="P10">Real-time</text:p>
        </text:list-item>
      </text:list>
      <text:p text:style-name="Text_20_body"><text:span text:style-name="Strong_20_Emphasis">One Line</text:span></text:p>
      <text:p text:style-name="Quotations">"Receives events immediately without polling."</text:p>
      <text:p text:style-name="Horizontal_20_Line"/>
      <text:h text:style-name="Heading_20_1" text:outline-level="1"><text:span text:style-name="Strong_20_Emphasis">5. Data Collector</text:span></text:h>
      <text:p text:style-name="Text_20_body"><text:span text:style-name="Strong_20_Emphasis">Purpose</text:span></text:p>
      <text:list text:style-name="L10">
        <text:list-item>
          <text:p text:style-name="P11">Call APIs</text:p>
        </text:list-item>
        <text:list-item>
          <text:p text:style-name="P11">Fetch alerts</text:p>
        </text:list-item>
        <text:list-item>
          <text:p text:style-name="P11">Store temporarily</text:p>
        </text:list-item>
      </text:list>
      <text:p text:style-name="Text_20_body"><text:span text:style-name="Strong_20_Emphasis">Keywords</text:span></text:p>
      <text:list text:style-name="L11">
        <text:list-item>
          <text:p text:style-name="P12">GET Request</text:p>
        </text:list-item>
        <text:list-item>
          <text:p text:style-name="P12">JSON</text:p>
        </text:list-item>
        <text:list-item>
          <text:p text:style-name="P12">API</text:p>
        </text:list-item>
      </text:list>
      <text:p text:style-name="Text_20_body"><text:span text:style-name="Strong_20_Emphasis">One Line</text:span></text:p>
      <text:p text:style-name="Quotations">"Collects raw security events from products."</text:p>
      <text:p text:style-name="Horizontal_20_Line"/>
      <text:h text:style-name="Heading_20_1" text:outline-level="1"><text:span text:style-name="Strong_20_Emphasis">6. Payload Validator</text:span></text:h>
      <text:p text:style-name="Text_20_body"><text:span text:style-name="Strong_20_Emphasis">Purpose</text:span></text:p>
      <text:list text:style-name="L12">
        <text:list-item>
          <text:p text:style-name="P13">Validate incoming data</text:p>
        </text:list-item>
      </text:list>
      <text:p text:style-name="Text_20_body"><text:soft-page-break/><text:span text:style-name="Strong_20_Emphasis">Checks</text:span></text:p>
      <text:list text:style-name="L13">
        <text:list-item>
          <text:p text:style-name="P14">Required fields</text:p>
        </text:list-item>
        <text:list-item>
          <text:p text:style-name="P14">Timestamp</text:p>
        </text:list-item>
        <text:list-item>
          <text:p text:style-name="P14">JSON</text:p>
        </text:list-item>
        <text:list-item>
          <text:p text:style-name="P14">Data types</text:p>
        </text:list-item>
      </text:list>
      <text:p text:style-name="Text_20_body"><text:span text:style-name="Strong_20_Emphasis">Technology</text:span></text:p>
      <text:list text:style-name="L14">
        <text:list-item>
          <text:p text:style-name="P15">Pydantic</text:p>
        </text:list-item>
      </text:list>
      <text:p text:style-name="Text_20_body"><text:span text:style-name="Strong_20_Emphasis">One Line</text:span></text:p>
      <text:p text:style-name="Quotations">"Ensures only valid events enter the pipeline."</text:p>
      <text:p text:style-name="Horizontal_20_Line"/>
      <text:h text:style-name="Heading_20_1" text:outline-level="1"><text:span text:style-name="Strong_20_Emphasis">7. Duplicate Detector</text:span></text:h>
      <text:p text:style-name="Text_20_body"><text:span text:style-name="Strong_20_Emphasis">Purpose</text:span></text:p>
      <text:list text:style-name="L15">
        <text:list-item>
          <text:p text:style-name="P16">Remove repeated events</text:p>
        </text:list-item>
      </text:list>
      <text:p text:style-name="Text_20_body"><text:span text:style-name="Strong_20_Emphasis">Keywords</text:span></text:p>
      <text:list text:style-name="L16">
        <text:list-item>
          <text:p text:style-name="P17">Event ID</text:p>
        </text:list-item>
        <text:list-item>
          <text:p text:style-name="P17">Redis</text:p>
        </text:list-item>
        <text:list-item>
          <text:p text:style-name="P17">Cache</text:p>
        </text:list-item>
      </text:list>
      <text:p text:style-name="Text_20_body"><text:span text:style-name="Strong_20_Emphasis">One Line</text:span></text:p>
      <text:p text:style-name="Quotations">"Prevents processing the same alert multiple times."</text:p>
      <text:p text:style-name="Horizontal_20_Line"/>
      <text:h text:style-name="Heading_20_1" text:outline-level="1"><text:span text:style-name="Strong_20_Emphasis">8. Metadata Enrichment</text:span></text:h>
      <text:p text:style-name="Text_20_body"><text:span text:style-name="Strong_20_Emphasis">Purpose</text:span></text:p>
      <text:list text:style-name="L17">
        <text:list-item>
          <text:p text:style-name="P18">Add extra information</text:p>
        </text:list-item>
      </text:list>
      <text:p text:style-name="Text_20_body"><text:span text:style-name="Strong_20_Emphasis">Adds</text:span></text:p>
      <text:list text:style-name="L18">
        <text:list-item>
          <text:p text:style-name="P19">Connector</text:p>
        </text:list-item>
        <text:list-item>
          <text:p text:style-name="P19">Tenant</text:p>
        </text:list-item>
        <text:list-item>
          <text:p text:style-name="P19">Ingestion Time</text:p>
        </text:list-item>
      </text:list>
      <text:p text:style-name="Text_20_body"><text:span text:style-name="Strong_20_Emphasis">One Line</text:span></text:p>
      <text:p text:style-name="Quotations">"Adds context without changing the original event."</text:p>
      <text:p text:style-name="Horizontal_20_Line"/>
      <text:h text:style-name="Heading_20_1" text:outline-level="1"><text:soft-page-break/><text:span text:style-name="Strong_20_Emphasis">9. Event Publisher</text:span></text:h>
      <text:p text:style-name="Text_20_body"><text:span text:style-name="Strong_20_Emphasis">Purpose</text:span></text:p>
      <text:list text:style-name="L19">
        <text:list-item>
          <text:p text:style-name="P20">Send events to Kafka</text:p>
        </text:list-item>
      </text:list>
      <text:p text:style-name="Text_20_body"><text:span text:style-name="Strong_20_Emphasis">Keywords</text:span></text:p>
      <text:list text:style-name="L20">
        <text:list-item>
          <text:p text:style-name="P21">Kafka</text:p>
        </text:list-item>
        <text:list-item>
          <text:p text:style-name="P21">RabbitMQ</text:p>
        </text:list-item>
        <text:list-item>
          <text:p text:style-name="P21">Queue</text:p>
        </text:list-item>
      </text:list>
      <text:p text:style-name="Text_20_body"><text:span text:style-name="Strong_20_Emphasis">One Line</text:span></text:p>
      <text:p text:style-name="Quotations">"Publishes validated events for Stage 2."</text:p>
      <text:p text:style-name="Horizontal_20_Line"/>
      <text:h text:style-name="Heading_20_1" text:outline-level="1"><text:span text:style-name="Strong_20_Emphasis">Technologies</text:span></text:h>
      <text:list text:style-name="L21">
        <text:list-item>
          <text:p text:style-name="P22"><text:span text:style-name="Strong_20_Emphasis">FastAPI</text:span> → API Server</text:p>
        </text:list-item>
        <text:list-item>
          <text:p text:style-name="P22"><text:span text:style-name="Strong_20_Emphasis">HTTPX</text:span> → API Calls</text:p>
        </text:list-item>
        <text:list-item>
          <text:p text:style-name="P22"><text:span text:style-name="Strong_20_Emphasis">Pydantic</text:span> → Validation</text:p>
        </text:list-item>
        <text:list-item>
          <text:p text:style-name="P22"><text:span text:style-name="Strong_20_Emphasis">AsyncIO/APScheduler</text:span> → Scheduling</text:p>
        </text:list-item>
        <text:list-item>
          <text:p text:style-name="P22"><text:span text:style-name="Strong_20_Emphasis">Redis</text:span> → Deduplication</text:p>
        </text:list-item>
        <text:list-item>
          <text:p text:style-name="P22"><text:span text:style-name="Strong_20_Emphasis">Kafka/RabbitMQ</text:span> → Messaging</text:p>
        </text:list-item>
        <text:list-item>
          <text:p text:style-name="P22"><text:span text:style-name="Strong_20_Emphasis">Docker</text:span> → Deployment</text:p>
        </text:list-item>
      </text:list>
      <text:p text:style-name="Horizontal_20_Line"/>
      <text:h text:style-name="Heading_20_1" text:outline-level="1"><text:span text:style-name="Strong_20_Emphasis">5-Step Memory Trick</text:span></text:h>
      <text:p text:style-name="Text_20_body"><text:span text:style-name="Strong_20_Emphasis">Collect</text:span> → Data Collector<text:line-break/><text:span text:style-name="Strong_20_Emphasis">Validate</text:span> → Payload Validator<text:line-break/><text:span text:style-name="Strong_20_Emphasis">Deduplicate</text:span> → Duplicate Detector<text:line-break/><text:span text:style-name="Strong_20_Emphasis">Enrich</text:span> → Metadata Service<text:line-break/><text:span text:style-name="Strong_20_Emphasis">Publish</text:span> → Kafka Publisher</text:p>
      <text:p text:style-name="Text_20_body"><text:span text:style-name="Strong_20_Emphasis">Presentation Closing Line:</text:span></text:p>
      <text:p text:style-name="Quotations">"Stage 1 is responsible for collecting data from multiple security products, validating it, removing duplicates, enriching it with metadata, and publishing it to Kafka. It does not perform any AI analysis—its only goal is to deliver clean, reliable data to Stage 2."</text:p>
      <text:p text:style-name="Standard"/>
      <text:p text:style-name="Standard"/>
      <text:p text:style-name="Standard"><text:span text:style-name="Strong_20_Emphasis"/></text:p>
      <text:p text:style-name="Horizontal_20_Line"/>
      <text:h text:style-name="Heading_20_1" text:outline-level="1"><text:soft-page-break/>Overall Architecture</text:h>
      <text:p text:style-name="Preformatted_20_Text"><text:span text:style-name="Source_20_Text"><text:s text:c="19"/>ABC Enterprise</text:span></text:p>
      <text:p text:style-name="Preformatted_20_Text"/>
      <text:p text:style-name="Preformatted_20_Text"><text:span text:style-name="Source_20_Text">+--------------------+ <text:s text:c="4"/>+------------------+ <text:s text:c="4"/>+------------------+</text:span></text:p>
      <text:p text:style-name="Preformatted_20_Text"><text:span text:style-name="Source_20_Text">| Windows Laptop <text:s text:c="4"/>| <text:s text:c="4"/>| Linux Server <text:s text:c="4"/>| <text:s text:c="4"/>| Linux Server <text:s text:c="4"/>|</text:span></text:p>
      <text:p text:style-name="Preformatted_20_Text"><text:span text:style-name="Source_20_Text">| Sysmon <text:s text:c="12"/>| <text:s text:c="4"/>| Suricata <text:s text:c="8"/>| <text:s text:c="4"/>| OpenVAS <text:s text:c="9"/>|</text:span></text:p>
      <text:p text:style-name="Preformatted_20_Text"><text:span text:style-name="Source_20_Text">+---------+----------+ <text:s text:c="4"/>+---------+--------+ <text:s text:c="4"/>+---------+--------+</text:span></text:p>
      <text:p text:style-name="Preformatted_20_Text"><text:span text:style-name="Source_20_Text"><text:s text:c="10"/>| <text:s text:c="25"/>| <text:s text:c="23"/>|</text:span></text:p>
      <text:p text:style-name="Preformatted_20_Text"><text:span text:style-name="Source_20_Text"><text:s text:c="10"/>| <text:s text:c="25"/>| <text:s text:c="23"/>|</text:span></text:p>
      <text:p text:style-name="Preformatted_20_Text"><text:span text:style-name="Source_20_Text"><text:s text:c="10"/>+------------Enterprise Network---------------------+</text:span></text:p>
      <text:p text:style-name="Preformatted_20_Text"><text:span text:style-name="Source_20_Text"><text:s text:c="37"/>|</text:span></text:p>
      <text:p text:style-name="Preformatted_20_Text"><text:span text:style-name="Source_20_Text"><text:s text:c="37"/>|</text:span></text:p>
      <text:p text:style-name="Preformatted_20_Text"><text:span text:style-name="Source_20_Text"><text:s text:c="26"/>SentinelAI Stage 1</text:span></text:p>
      <text:p text:style-name="Preformatted_20_Text"><text:span text:style-name="Source_20_Text"><text:s text:c="37"/>|</text:span></text:p>
      <text:p text:style-name="Preformatted_20_Text"><text:span text:style-name="Source_20_Text"><text:s text:c="8"/>-------------------------------------------------</text:span></text:p>
      <text:p text:style-name="Preformatted_20_Text"><text:span text:style-name="Source_20_Text"><text:s text:c="8"/>| Connector Manager <text:s text:c="27"/>|</text:span></text:p>
      <text:p text:style-name="Preformatted_20_Text"><text:span text:style-name="Source_20_Text"><text:s text:c="8"/>| Scheduler <text:s text:c="35"/>|</text:span></text:p>
      <text:p text:style-name="Preformatted_20_Text"><text:span text:style-name="Source_20_Text"><text:s text:c="8"/>| Data Collector <text:s text:c="30"/>|</text:span></text:p>
      <text:p text:style-name="Preformatted_20_Text"><text:span text:style-name="Source_20_Text"><text:s text:c="8"/>| Payload Validator <text:s text:c="27"/>|</text:span></text:p>
      <text:p text:style-name="Preformatted_20_Text"><text:span text:style-name="Source_20_Text"><text:s text:c="8"/>| Duplicate Detection <text:s text:c="25"/>|</text:span></text:p>
      <text:p text:style-name="Preformatted_20_Text"><text:span text:style-name="Source_20_Text"><text:s text:c="8"/>| Metadata Enrichment <text:s text:c="25"/>|</text:span></text:p>
      <text:p text:style-name="Preformatted_20_Text"><text:span text:style-name="Source_20_Text"><text:s text:c="8"/>| Event Publisher <text:s text:c="29"/>|</text:span></text:p>
      <text:p text:style-name="Preformatted_20_Text"><text:span text:style-name="Source_20_Text"><text:s text:c="8"/>-------------------------------------------------</text:span></text:p>
      <text:p text:style-name="Preformatted_20_Text"><text:span text:style-name="Source_20_Text"><text:s text:c="37"/>|</text:span></text:p>
      <text:p text:style-name="Preformatted_20_Text"><text:span text:style-name="Source_20_Text"><text:s text:c="35"/>Kafka</text:span></text:p>
      <text:p text:style-name="Preformatted_20_Text"><text:span text:style-name="Source_20_Text"><text:s text:c="37"/>|</text:span></text:p>
      <text:p text:style-name="P1"><text:span text:style-name="Source_20_Text"><text:s text:c="33"/>Stage 2</text:span></text:p>
      <text:p text:style-name="Text_20_body">Notice something important:</text:p>
      <text:p text:style-name="Text_20_body"><text:span text:style-name="Strong_20_Emphasis">SentinelAI never installs anything inside those products.</text:span></text:p>
      <text:p text:style-name="Text_20_body">It only <text:span text:style-name="Strong_20_Emphasis">connects</text:span> to them.</text:p>
      <text:p text:style-name="Horizontal_20_Line"/>
      <text:h text:style-name="Heading_20_1" text:outline-level="1">STEP 1 — Install the security tools</text:h>
      <text:p text:style-name="Text_20_body">Suppose you have:</text:p>
      <text:p text:style-name="Text_20_body"><text:span text:style-name="Strong_20_Emphasis">Machine 1 (Windows)</text:span></text:p>
      <text:p text:style-name="Text_20_body">Install</text:p>
      <text:list text:style-name="L42">
        <text:list-item>
          <text:p text:style-name="P43">Sysmon</text:p>
        </text:list-item>
      </text:list>
      <text:p text:style-name="Text_20_body">This starts generating Windows events automatically.</text:p>
      <text:p text:style-name="Text_20_body">Examples:</text:p>
      <text:list text:style-name="L43">
        <text:list-item>
          <text:p text:style-name="P44">User login</text:p>
        </text:list-item>
        <text:list-item>
          <text:p text:style-name="P44">USB inserted</text:p>
        </text:list-item>
        <text:list-item>
          <text:p text:style-name="P44">Program started</text:p>
        </text:list-item>
        <text:list-item>
          <text:p text:style-name="P44">Registry changed</text:p>
        </text:list-item>
      </text:list>
      <text:p text:style-name="Horizontal_20_Line"/>
      <text:p text:style-name="Text_20_body"><text:soft-page-break/><text:span text:style-name="Strong_20_Emphasis">Machine 2 (Ubuntu VM)</text:span></text:p>
      <text:p text:style-name="Text_20_body">Install</text:p>
      <text:p text:style-name="Text_20_body">Suricata</text:p>
      <text:p text:style-name="Text_20_body">It immediately starts monitoring network traffic.</text:p>
      <text:p text:style-name="Text_20_body">If someone runs</text:p>
      <text:p text:style-name="P1"><text:span text:style-name="Source_20_Text">nmap 192.168.1.10</text:span></text:p>
      <text:p text:style-name="Text_20_body">Suricata generates an alert.</text:p>
      <text:p text:style-name="Horizontal_20_Line"/>
      <text:p text:style-name="Text_20_body"><text:span text:style-name="Strong_20_Emphasis">Machine 3 (Ubuntu VM)</text:span></text:p>
      <text:p text:style-name="Text_20_body">Install</text:p>
      <text:p text:style-name="Text_20_body">OpenVAS</text:p>
      <text:p text:style-name="Text_20_body">Run a vulnerability scan.</text:p>
      <text:p text:style-name="Text_20_body">OpenVAS creates a report.</text:p>
      <text:p text:style-name="Horizontal_20_Line"/>
      <text:p text:style-name="Text_20_body">At this point,</text:p>
      <text:p text:style-name="Text_20_body">SentinelAI is <text:span text:style-name="Strong_20_Emphasis">NOT running</text:span>.</text:p>
      <text:p text:style-name="Text_20_body">These tools simply keep producing security data.</text:p>
      <text:p text:style-name="Horizontal_20_Line"/>
      <text:h text:style-name="Heading_20_1" text:outline-level="1">STEP 2 — Study how each tool exposes data</text:h>
      <text:p text:style-name="Text_20_body">Every product provides data differently.</text:p>
      <text:p text:style-name="Text_20_body">For example</text:p>
      <text:h text:style-name="Heading_20_3" text:outline-level="3">Sysmon</text:h>
      <text:p text:style-name="Text_20_body">Stores logs in</text:p>
      <text:p text:style-name="P1"><text:span text:style-name="Source_20_Text">Windows Event Log</text:span></text:p>
      <text:p text:style-name="Horizontal_20_Line"/>
      <text:h text:style-name="Heading_20_3" text:outline-level="3">Suricata</text:h>
      <text:p text:style-name="Text_20_body">Writes alerts to</text:p>
      <text:p text:style-name="P1"><text:span text:style-name="Source_20_Text">/var/log/suricata/eve.json</text:span></text:p>
      <text:p text:style-name="Horizontal_20_Line"/>
      <text:h text:style-name="Heading_20_3" text:outline-level="3"><text:soft-page-break/>OpenVAS</text:h>
      <text:p text:style-name="Text_20_body">Stores reports</text:p>
      <text:p text:style-name="Text_20_body">accessible through</text:p>
      <text:p text:style-name="Preformatted_20_Text"><text:span text:style-name="Source_20_Text">REST API</text:span></text:p>
      <text:p text:style-name="Preformatted_20_Text"/>
      <text:p text:style-name="Preformatted_20_Text"><text:span text:style-name="Source_20_Text">or</text:span></text:p>
      <text:p text:style-name="Preformatted_20_Text"/>
      <text:p text:style-name="P1"><text:span text:style-name="Source_20_Text">GMP API</text:span></text:p>
      <text:p text:style-name="Text_20_body">This is exactly why Stage 1 has connectors.</text:p>
      <text:p text:style-name="Horizontal_20_Line"/>
      <text:h text:style-name="Heading_20_1" text:outline-level="1">STEP 3 — Build Connectors</text:h>
      <text:p text:style-name="Text_20_body">Now create</text:p>
      <text:p text:style-name="Preformatted_20_Text"><text:span text:style-name="Source_20_Text">connectors/</text:span></text:p>
      <text:p text:style-name="Preformatted_20_Text"/>
      <text:p text:style-name="Preformatted_20_Text"><text:span text:style-name="Source_20_Text"><text:s text:c="4"/>sysmon_connector.py</text:span></text:p>
      <text:p text:style-name="Preformatted_20_Text"/>
      <text:p text:style-name="Preformatted_20_Text"><text:span text:style-name="Source_20_Text"><text:s text:c="4"/>suricata_connector.py</text:span></text:p>
      <text:p text:style-name="Preformatted_20_Text"/>
      <text:p text:style-name="P1"><text:span text:style-name="Source_20_Text"><text:s text:c="4"/>openvas_connector.py</text:span></text:p>
      <text:p text:style-name="Text_20_body">Each connector knows</text:p>
      <text:list text:style-name="L44">
        <text:list-item>
          <text:p text:style-name="P45">where data is</text:p>
        </text:list-item>
        <text:list-item>
          <text:p text:style-name="P45">how to read it</text:p>
        </text:list-item>
        <text:list-item>
          <text:p text:style-name="P45">how often to read it</text:p>
        </text:list-item>
      </text:list>
      <text:p text:style-name="Text_20_body">Example</text:p>
      <text:p text:style-name="Preformatted_20_Text"><text:span text:style-name="Source_20_Text">Sysmon Connector</text:span></text:p>
      <text:p text:style-name="Preformatted_20_Text"/>
      <text:p text:style-name="Preformatted_20_Text"><text:span text:style-name="Source_20_Text">↓</text:span></text:p>
      <text:p text:style-name="Preformatted_20_Text"/>
      <text:p text:style-name="Preformatted_20_Text"><text:span text:style-name="Source_20_Text">Read Windows Event Log</text:span></text:p>
      <text:p text:style-name="Preformatted_20_Text"/>
      <text:p text:style-name="Preformatted_20_Text"><text:span text:style-name="Source_20_Text">↓</text:span></text:p>
      <text:p text:style-name="Preformatted_20_Text"/>
      <text:p text:style-name="P1"><text:span text:style-name="Source_20_Text">Return events</text:span></text:p>
      <text:p text:style-name="Horizontal_20_Line"/>
      <text:p text:style-name="Text_20_body">Suricata Connector</text:p>
      <text:p text:style-name="Preformatted_20_Text"><text:span text:style-name="Source_20_Text">Read</text:span></text:p>
      <text:p text:style-name="Preformatted_20_Text"/>
      <text:p text:style-name="Preformatted_20_Text"><text:span text:style-name="Source_20_Text">/var/log/suricata/eve.json</text:span></text:p>
      <text:p text:style-name="Preformatted_20_Text"/>
      <text:p text:style-name="Preformatted_20_Text"><text:span text:style-name="Source_20_Text">↓</text:span></text:p>
      <text:p text:style-name="Preformatted_20_Text"/>
      <text:p text:style-name="P1"><text:span text:style-name="Source_20_Text">Return alerts</text:span></text:p>
      <text:p text:style-name="Horizontal_20_Line"/>
      <text:p text:style-name="Text_20_body"><text:soft-page-break/>OpenVAS Connector</text:p>
      <text:p text:style-name="Preformatted_20_Text"><text:span text:style-name="Source_20_Text">Call API</text:span></text:p>
      <text:p text:style-name="Preformatted_20_Text"/>
      <text:p text:style-name="Preformatted_20_Text"><text:span text:style-name="Source_20_Text">↓</text:span></text:p>
      <text:p text:style-name="Preformatted_20_Text"/>
      <text:p text:style-name="P1"><text:span text:style-name="Source_20_Text">Receive vulnerabilities</text:span></text:p>
      <text:p text:style-name="Horizontal_20_Line"/>
      <text:h text:style-name="Heading_20_1" text:outline-level="1">STEP 4 — Connector Configuration</text:h>
      <text:p text:style-name="Text_20_body">Create</text:p>
      <text:p text:style-name="P1"><text:span text:style-name="Source_20_Text">connectors.yaml</text:span></text:p>
      <text:p text:style-name="Text_20_body">Example</text:p>
      <text:p text:style-name="Preformatted_20_Text"><text:span text:style-name="Source_20_Text">connectors:</text:span></text:p>
      <text:p text:style-name="Preformatted_20_Text"/>
      <text:p text:style-name="Preformatted_20_Text"><text:span text:style-name="Source_20_Text"><text:s text:c="2"/>sysmon:</text:span></text:p>
      <text:p text:style-name="Preformatted_20_Text"/>
      <text:p text:style-name="Preformatted_20_Text"><text:span text:style-name="Source_20_Text"><text:s text:c="4"/>enabled: true</text:span></text:p>
      <text:p text:style-name="Preformatted_20_Text"/>
      <text:p text:style-name="Preformatted_20_Text"><text:span text:style-name="Source_20_Text"><text:s text:c="4"/>poll: 30</text:span></text:p>
      <text:p text:style-name="Preformatted_20_Text"/>
      <text:p text:style-name="Preformatted_20_Text"><text:span text:style-name="Source_20_Text"><text:s text:c="2"/>suricata:</text:span></text:p>
      <text:p text:style-name="Preformatted_20_Text"/>
      <text:p text:style-name="Preformatted_20_Text"><text:span text:style-name="Source_20_Text"><text:s text:c="4"/>enabled: true</text:span></text:p>
      <text:p text:style-name="Preformatted_20_Text"/>
      <text:p text:style-name="Preformatted_20_Text"><text:span text:style-name="Source_20_Text"><text:s text:c="4"/>poll: 20</text:span></text:p>
      <text:p text:style-name="Preformatted_20_Text"/>
      <text:p text:style-name="Preformatted_20_Text"><text:span text:style-name="Source_20_Text"><text:s text:c="2"/>openvas:</text:span></text:p>
      <text:p text:style-name="Preformatted_20_Text"/>
      <text:p text:style-name="Preformatted_20_Text"><text:span text:style-name="Source_20_Text"><text:s text:c="4"/>enabled: true</text:span></text:p>
      <text:p text:style-name="Preformatted_20_Text"/>
      <text:p text:style-name="P1"><text:span text:style-name="Source_20_Text"><text:s text:c="4"/>poll: 300</text:span></text:p>
      <text:p text:style-name="Text_20_body">Your Connector Manager loads this at startup.</text:p>
      <text:p text:style-name="Horizontal_20_Line"/>
      <text:h text:style-name="Heading_20_1" text:outline-level="1">STEP 5 — Scheduler</text:h>
      <text:p text:style-name="Text_20_body">Scheduler wakes up</text:p>
      <text:p text:style-name="P1"><text:span text:style-name="Source_20_Text">00:00</text:span></text:p>
      <text:p text:style-name="Text_20_body">Reads</text:p>
      <text:p text:style-name="P1"><text:span text:style-name="Source_20_Text">connectors.yaml</text:span></text:p>
      <text:p text:style-name="Text_20_body">Starts</text:p>
      <text:p text:style-name="Preformatted_20_Text"><text:span text:style-name="Source_20_Text">Sysmon Connector</text:span></text:p>
      <text:p text:style-name="Preformatted_20_Text"/>
      <text:p text:style-name="Preformatted_20_Text"><text:span text:style-name="Source_20_Text">Suricata Connector</text:span></text:p>
      <text:p text:style-name="Preformatted_20_Text"/>
      <text:p text:style-name="P1"><text:span text:style-name="Source_20_Text">OpenVAS Connector</text:span></text:p>
      <text:p text:style-name="Text_20_body"><text:soft-page-break/>Each runs independently.</text:p>
      <text:p text:style-name="Horizontal_20_Line"/>
      <text:h text:style-name="Heading_20_1" text:outline-level="1">STEP 6 — Connector receives data</text:h>
      <text:p text:style-name="Text_20_body">Example</text:p>
      <text:p text:style-name="Text_20_body">Suricata detects</text:p>
      <text:p text:style-name="P1"><text:span text:style-name="Source_20_Text">Port Scan</text:span></text:p>
      <text:p text:style-name="Text_20_body">Its log</text:p>
      <text:p text:style-name="P1"><text:span text:style-name="Source_20_Text">eve.json</text:span></text:p>
      <text:p text:style-name="Text_20_body">contains</text:p>
      <text:p text:style-name="Preformatted_20_Text"><text:span text:style-name="Source_20_Text">{</text:span></text:p>
      <text:p text:style-name="Preformatted_20_Text"><text:span text:style-name="Source_20_Text"><text:s text:c="4"/>"event_type":"alert",</text:span></text:p>
      <text:p text:style-name="Preformatted_20_Text"><text:span text:style-name="Source_20_Text"><text:s text:c="4"/>"src_ip":"192.168.1.5",</text:span></text:p>
      <text:p text:style-name="Preformatted_20_Text"><text:span text:style-name="Source_20_Text"><text:s text:c="4"/>"severity":2</text:span></text:p>
      <text:p text:style-name="P1"><text:span text:style-name="Source_20_Text">}</text:span></text:p>
      <text:p text:style-name="Text_20_body">Connector reads it.</text:p>
      <text:p text:style-name="Text_20_body">Returns Python object.</text:p>
      <text:p text:style-name="Horizontal_20_Line"/>
      <text:h text:style-name="Heading_20_1" text:outline-level="1">STEP 7 — Data Collector</text:h>
      <text:p text:style-name="Text_20_body">Now all connectors return data.</text:p>
      <text:p text:style-name="Text_20_body">Example</text:p>
      <text:p text:style-name="Preformatted_20_Text"><text:span text:style-name="Source_20_Text">Sysmon</text:span></text:p>
      <text:p text:style-name="Preformatted_20_Text"/>
      <text:p text:style-name="Preformatted_20_Text"><text:span text:style-name="Source_20_Text">↓</text:span></text:p>
      <text:p text:style-name="Preformatted_20_Text"/>
      <text:p text:style-name="Preformatted_20_Text"><text:span text:style-name="Source_20_Text">3 events</text:span></text:p>
      <text:p text:style-name="Preformatted_20_Text"/>
      <text:p text:style-name="Preformatted_20_Text"><text:span text:style-name="Source_20_Text">Suricata</text:span></text:p>
      <text:p text:style-name="Preformatted_20_Text"/>
      <text:p text:style-name="Preformatted_20_Text"><text:span text:style-name="Source_20_Text">↓</text:span></text:p>
      <text:p text:style-name="Preformatted_20_Text"/>
      <text:p text:style-name="Preformatted_20_Text"><text:span text:style-name="Source_20_Text">2 alerts</text:span></text:p>
      <text:p text:style-name="Preformatted_20_Text"/>
      <text:p text:style-name="Preformatted_20_Text"><text:span text:style-name="Source_20_Text">OpenVAS</text:span></text:p>
      <text:p text:style-name="Preformatted_20_Text"/>
      <text:p text:style-name="Preformatted_20_Text"><text:span text:style-name="Source_20_Text">↓</text:span></text:p>
      <text:p text:style-name="Preformatted_20_Text"/>
      <text:p text:style-name="P1"><text:span text:style-name="Source_20_Text">1 vulnerability</text:span></text:p>
      <text:p text:style-name="Text_20_body">Collector merges them.</text:p>
      <text:p text:style-name="Text_20_body">Now Stage 1 has</text:p>
      <text:p text:style-name="P1"><text:span text:style-name="Source_20_Text">6 raw events</text:span></text:p>
      <text:p text:style-name="Horizontal_20_Line"><text:soft-page-break/></text:p>
      <text:h text:style-name="Heading_20_1" text:outline-level="1">STEP 8 — Payload Validation</text:h>
      <text:p text:style-name="Text_20_body">Validator checks</text:p>
      <text:p text:style-name="Preformatted_20_Text"><text:span text:style-name="Source_20_Text">Timestamp</text:span></text:p>
      <text:p text:style-name="Preformatted_20_Text"/>
      <text:p text:style-name="Preformatted_20_Text"><text:span text:style-name="Source_20_Text">Exists?</text:span></text:p>
      <text:p text:style-name="Preformatted_20_Text"/>
      <text:p text:style-name="Preformatted_20_Text"><text:span text:style-name="Source_20_Text">YES</text:span></text:p>
      <text:p text:style-name="Preformatted_20_Text"/>
      <text:p text:style-name="Preformatted_20_Text"><text:span text:style-name="Source_20_Text">↓</text:span></text:p>
      <text:p text:style-name="Preformatted_20_Text"/>
      <text:p text:style-name="Preformatted_20_Text"><text:span text:style-name="Source_20_Text">Asset</text:span></text:p>
      <text:p text:style-name="Preformatted_20_Text"/>
      <text:p text:style-name="Preformatted_20_Text"><text:span text:style-name="Source_20_Text">Exists?</text:span></text:p>
      <text:p text:style-name="Preformatted_20_Text"/>
      <text:p text:style-name="Preformatted_20_Text"><text:span text:style-name="Source_20_Text">YES</text:span></text:p>
      <text:p text:style-name="Preformatted_20_Text"/>
      <text:p text:style-name="Preformatted_20_Text"><text:span text:style-name="Source_20_Text">↓</text:span></text:p>
      <text:p text:style-name="Preformatted_20_Text"/>
      <text:p text:style-name="Preformatted_20_Text"><text:span text:style-name="Source_20_Text">Severity</text:span></text:p>
      <text:p text:style-name="Preformatted_20_Text"/>
      <text:p text:style-name="Preformatted_20_Text"><text:span text:style-name="Source_20_Text">Exists?</text:span></text:p>
      <text:p text:style-name="Preformatted_20_Text"/>
      <text:p text:style-name="Preformatted_20_Text"><text:span text:style-name="Source_20_Text">YES</text:span></text:p>
      <text:p text:style-name="Preformatted_20_Text"/>
      <text:p text:style-name="Preformatted_20_Text"><text:span text:style-name="Source_20_Text">↓</text:span></text:p>
      <text:p text:style-name="Preformatted_20_Text"/>
      <text:p text:style-name="P1"><text:span text:style-name="Source_20_Text">Accepted</text:span></text:p>
      <text:p text:style-name="Text_20_body">If</text:p>
      <text:p text:style-name="Preformatted_20_Text"><text:span text:style-name="Source_20_Text">timestamp</text:span></text:p>
      <text:p text:style-name="Preformatted_20_Text"/>
      <text:p text:style-name="P1"><text:span text:style-name="Source_20_Text">missing</text:span></text:p>
      <text:p text:style-name="Text_20_body">Reject.</text:p>
      <text:p text:style-name="Horizontal_20_Line"/>
      <text:h text:style-name="Heading_20_1" text:outline-level="1">STEP 9 — Duplicate Detection</text:h>
      <text:p text:style-name="Text_20_body">Suppose</text:p>
      <text:p text:style-name="Text_20_body">OpenVAS returns</text:p>
      <text:p text:style-name="P1"><text:span text:style-name="Source_20_Text">CVE123</text:span></text:p>
      <text:p text:style-name="Text_20_body">again.</text:p>
      <text:p text:style-name="Text_20_body">Detector checks</text:p>
      <text:p text:style-name="Preformatted_20_Text"><text:span text:style-name="Source_20_Text">Already seen?</text:span></text:p>
      <text:p text:style-name="Preformatted_20_Text"/>
      <text:p text:style-name="Preformatted_20_Text"><text:span text:style-name="Source_20_Text">↓</text:span></text:p>
      <text:p text:style-name="Preformatted_20_Text"/>
      <text:p text:style-name="Preformatted_20_Text"><text:span text:style-name="Source_20_Text">YES</text:span></text:p>
      <text:p text:style-name="Preformatted_20_Text"><text:soft-page-break/></text:p>
      <text:p text:style-name="Preformatted_20_Text"><text:span text:style-name="Source_20_Text">↓</text:span></text:p>
      <text:p text:style-name="Preformatted_20_Text"/>
      <text:p text:style-name="P1"><text:span text:style-name="Source_20_Text">Discard</text:span></text:p>
      <text:p text:style-name="Horizontal_20_Line"/>
      <text:h text:style-name="Heading_20_1" text:outline-level="1">STEP 10 — Metadata</text:h>
      <text:p text:style-name="Text_20_body">Before</text:p>
      <text:p text:style-name="Preformatted_20_Text"><text:span text:style-name="Source_20_Text">{</text:span></text:p>
      <text:p text:style-name="Preformatted_20_Text"><text:span text:style-name="Source_20_Text"><text:s/>"severity":"High"</text:span></text:p>
      <text:p text:style-name="P1"><text:span text:style-name="Source_20_Text">}</text:span></text:p>
      <text:p text:style-name="Text_20_body">After</text:p>
      <text:p text:style-name="Preformatted_20_Text"><text:span text:style-name="Source_20_Text">{</text:span></text:p>
      <text:p text:style-name="Preformatted_20_Text"><text:span text:style-name="Source_20_Text"><text:s/>"severity":"High",</text:span></text:p>
      <text:p text:style-name="Preformatted_20_Text"/>
      <text:p text:style-name="Preformatted_20_Text"><text:span text:style-name="Source_20_Text"><text:s/>"connector":"OpenVAS",</text:span></text:p>
      <text:p text:style-name="Preformatted_20_Text"/>
      <text:p text:style-name="Preformatted_20_Text"><text:span text:style-name="Source_20_Text"><text:s/>"tenant":"ABC",</text:span></text:p>
      <text:p text:style-name="Preformatted_20_Text"/>
      <text:p text:style-name="Preformatted_20_Text"><text:span text:style-name="Source_20_Text"><text:s/>"received_at":"10:10"</text:span></text:p>
      <text:p text:style-name="P1"><text:span text:style-name="Source_20_Text">}</text:span></text:p>
      <text:p text:style-name="Horizontal_20_Line"/>
      <text:h text:style-name="Heading_20_1" text:outline-level="1">STEP 11 — Event Publisher</text:h>
      <text:p text:style-name="Text_20_body">Now publish</text:p>
      <text:p text:style-name="Preformatted_20_Text"><text:span text:style-name="Source_20_Text">Kafka Topic</text:span></text:p>
      <text:p text:style-name="Preformatted_20_Text"/>
      <text:p text:style-name="P1"><text:span text:style-name="Source_20_Text">enterprise_events</text:span></text:p>
      <text:p text:style-name="Text_20_body">Stage 2 receives.</text:p>
      <text:p text:style-name="Text_20_body">Stage 1 finished.</text:p>
      <text:p text:style-name="Horizontal_20_Line"/>
      <text:h text:style-name="Heading_20_1" text:outline-level="1">Real Example</text:h>
      <text:p text:style-name="Text_20_body">Imagine</text:p>
      <text:p text:style-name="Text_20_body">You start</text:p>
      <text:p text:style-name="P1"><text:span text:style-name="Source_20_Text">nmap</text:span></text:p>
      <text:p text:style-name="Text_20_body">against</text:p>
      <text:p text:style-name="Text_20_body">your Linux VM.</text:p>
      <text:p text:style-name="Horizontal_20_Line"/>
      <text:p text:style-name="Text_20_body"><text:soft-page-break/>Suricata</text:p>
      <text:p text:style-name="Text_20_body">generates</text:p>
      <text:p text:style-name="Preformatted_20_Text"><text:span text:style-name="Source_20_Text">{</text:span></text:p>
      <text:p text:style-name="Preformatted_20_Text"><text:span text:style-name="Source_20_Text">"src_ip":"192.168.1.5",</text:span></text:p>
      <text:p text:style-name="Preformatted_20_Text"/>
      <text:p text:style-name="Preformatted_20_Text"><text:span text:style-name="Source_20_Text">"signature":"ET SCAN NMAP"</text:span></text:p>
      <text:p text:style-name="P1"><text:span text:style-name="Source_20_Text">}</text:span></text:p>
      <text:p text:style-name="Text_20_body">↓</text:p>
      <text:p text:style-name="Text_20_body">Suricata Connector</text:p>
      <text:p text:style-name="Text_20_body">reads</text:p>
      <text:p text:style-name="P1"><text:span text:style-name="Source_20_Text">eve.json</text:span></text:p>
      <text:p text:style-name="Text_20_body">↓</text:p>
      <text:p text:style-name="Text_20_body">Validator</text:p>
      <text:p text:style-name="Text_20_body">↓</text:p>
      <text:p text:style-name="Text_20_body">Duplicate</text:p>
      <text:p text:style-name="Text_20_body">↓</text:p>
      <text:p text:style-name="Text_20_body">Metadata</text:p>
      <text:p text:style-name="Text_20_body">↓</text:p>
      <text:p text:style-name="Text_20_body">Kafka</text:p>
      <text:p text:style-name="Text_20_body">↓</text:p>
      <text:p text:style-name="Text_20_body">Stage 2</text:p>
      <text:p text:style-name="Text_20_body">Exactly the same pipeline works for Sysmon and OpenVAS.</text:p>
      <text:p text:style-name="Horizontal_20_Line"/>
      <text:h text:style-name="Heading_20_1" text:outline-level="1">How do connectors actually "connect"?</text:h>
      <text:p text:style-name="Text_20_body">This is the key question. They don't all connect in the same wa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ecurity Tool</text:p>
            </table:table-cell>
            <table:table-cell table:style-name="Table2.A1" office:value-type="string">
              <text:p text:style-name="Table_20_Heading">Connection Method</text:p>
            </table:table-cell>
            <table:table-cell table:style-name="Table2.A1" office:value-type="string">
              <text:p text:style-name="Table_20_Heading">What your connector does</text:p>
            </table:table-cell>
          </table:table-row>
        </table:table-header-rows>
        <table:table-row>
          <table:table-cell table:style-name="Table2.A1" office:value-type="string">
            <text:p text:style-name="Table_20_Contents">Sysmon</text:p>
          </table:table-cell>
          <table:table-cell table:style-name="Table2.A1" office:value-type="string">
            <text:p text:style-name="Table_20_Contents">Windows Event Log API</text:p>
          </table:table-cell>
          <table:table-cell table:style-name="Table2.A1" office:value-type="string">
            <text:p text:style-name="Table_20_Contents">Reads new event log entries</text:p>
          </table:table-cell>
        </table:table-row>
        <table:table-row>
          <table:table-cell table:style-name="Table2.A1" office:value-type="string">
            <text:p text:style-name="Table_20_Contents">Suricata</text:p>
          </table:table-cell>
          <table:table-cell table:style-name="Table2.A1" office:value-type="string">
            <text:p text:style-name="Table_20_Contents">Log file (<text:span text:style-name="Source_20_Text">eve.json</text:span>)</text:p>
          </table:table-cell>
          <table:table-cell table:style-name="Table2.A1" office:value-type="string">
            <text:p text:style-name="Table_20_Contents">Watches or tails the log file for new alerts</text:p>
          </table:table-cell>
        </table:table-row>
        <table:table-row>
          <table:table-cell table:style-name="Table2.A1" office:value-type="string">
            <text:p text:style-name="Table_20_Contents">OpenVAS</text:p>
          </table:table-cell>
          <table:table-cell table:style-name="Table2.A1" office:value-type="string">
            <text:p text:style-name="Table_20_Contents">REST/GMP API</text:p>
          </table:table-cell>
          <table:table-cell table:style-name="Table2.A1" office:value-type="string">
            <text:p text:style-name="Table_20_Contents">Makes authenticated API requests to fetch scan results</text:p>
          </table:table-cell>
        </table:table-row>
      </table:table>
      <text:p text:style-name="Text_20_body">So "connecting" means using <text:span text:style-name="Strong_20_Emphasis">the interface that the tool officially provides</text:span>—an API, a log file, a webhook, or an event log—not inventing a new protocol.</text:p>
      <text:p text:style-name="Horizontal_20_Line"/>
      <text:h text:style-name="Heading_20_1" text:outline-level="1"><text:soft-page-break/>Development order (this is the order I would follow)</text:h>
      <text:list text:style-name="L45">
        <text:list-item>
          <text:p text:style-name="P46"><text:span text:style-name="Strong_20_Emphasis">Install one tool</text:span> (start with Suricata or Sysmon).</text:p>
        </text:list-item>
        <text:list-item>
          <text:p text:style-name="P46">Verify it is generating real events.</text:p>
        </text:list-item>
        <text:list-item>
          <text:p text:style-name="P46">Write <text:span text:style-name="Strong_20_Emphasis">one connector</text:span> that can fetch those events.</text:p>
        </text:list-item>
        <text:list-item>
          <text:p text:style-name="P46">Build the validation, deduplication, metadata, and publisher pipeline.</text:p>
        </text:list-item>
        <text:list-item>
          <text:p text:style-name="P46">Confirm events reach Kafka (or even print them to the console first).</text:p>
        </text:list-item>
        <text:list-item>
          <text:p text:style-name="P46">Add the second connector.</text:p>
        </text:list-item>
        <text:list-item>
          <text:p text:style-name="P46">Add the third connector.</text:p>
        </text:list-item>
        <text:list-item>
          <text:p text:style-name="P46">Only after Stage 1 is stable, begin Stage 2.</text:p>
        </text:list-item>
      </text:list>
      <text:p text:style-name="Text_20_body">This incremental approach makes debugging much easier than trying to integrate everything at once.</text:p>
      <text:p text:style-name="Text_20_body"><text:span text:style-name="Strong_20_Emphasis">One suggestion:</text:span> Since your complete SentinelAI project has many stages, I would actually recommend using <text:span text:style-name="Strong_20_Emphasis">Wazuh instead of separate Sysmon and Suricata connectors</text:span>. Wazuh can collect Windows events, Linux logs, file integrity events, and more through a single platform with a REST API. Then you can pair it with <text:span text:style-name="Strong_20_Emphasis">OpenVAS</text:span> for vulnerability data. That reduces the number of connectors you need while still demonstrating a realistic enterprise ingestion engine.</text:p>
      <text:p text:style-name="Standard"><text:line-break/></text:p>
      <text:p text:style-name="Standard"/>
      <text:p text:style-name="Text_20_body">If I were evaluating your final-year project, I wouldn't be impressed just because you said, "I have an AWS connector." I would want to <text:span text:style-name="Strong_20_Emphasis">see the entire ingestion engine working</text:span>.</text:p>
      <text:p text:style-name="Text_20_body">The demo should make me feel like I'm watching a real enterprise platform ingest security data.</text:p>
      <text:p text:style-name="Horizontal_20_Line"/>
      <text:h text:style-name="Heading_20_1" text:outline-level="1">Stage 1 - Enterprise Data Ingestion Engine</text:h>
      <text:p text:style-name="Text_20_body">Think of Stage 1 as the <text:span text:style-name="Strong_20_Emphasis">reception desk</text:span> of SentinelAI.</text:p>
      <text:p text:style-name="Text_20_body">It doesn't decide whether an event is dangerous.</text:p>
      <text:p text:style-name="Text_20_body">It doesn't use AI.</text:p>
      <text:p text:style-name="Text_20_body">Its only responsibility is:</text:p>
      <text:p text:style-name="Quotations"><text:span text:style-name="Strong_20_Emphasis">Collect security findings from different enterprise security products, verify them, enrich them, and reliably deliver them to the next stage.</text:span></text:p>
      <text:p text:style-name="Horizontal_20_Line"/>
      <text:h text:style-name="Heading_20_1" text:outline-level="1"><text:soft-page-break/>Overall Architecture</text:h>
      <text:p text:style-name="Preformatted_20_Text"><text:span text:style-name="Source_20_Text"><text:s text:c="16"/>ABC ENTERPRISE</text:span></text:p>
      <text:p text:style-name="Preformatted_20_Text"/>
      <text:p text:style-name="Preformatted_20_Text"><text:span text:style-name="Source_20_Text">──────────────────────────────────────────────</text:span></text:p>
      <text:p text:style-name="Preformatted_20_Text"/>
      <text:p text:style-name="Preformatted_20_Text"><text:span text:style-name="Source_20_Text"><text:s text:c="8"/>AWS Security Hub</text:span></text:p>
      <text:p text:style-name="Preformatted_20_Text"/>
      <text:p text:style-name="Preformatted_20_Text"><text:span text:style-name="Source_20_Text"><text:s text:c="8"/>Wazuh</text:span></text:p>
      <text:p text:style-name="Preformatted_20_Text"/>
      <text:p text:style-name="Preformatted_20_Text"><text:span text:style-name="Source_20_Text"><text:s text:c="8"/>OpenVAS</text:span></text:p>
      <text:p text:style-name="Preformatted_20_Text"/>
      <text:p text:style-name="Preformatted_20_Text"><text:span text:style-name="Source_20_Text"><text:s text:c="8"/>Suricata</text:span></text:p>
      <text:p text:style-name="Preformatted_20_Text"/>
      <text:p text:style-name="Preformatted_20_Text"><text:span text:style-name="Source_20_Text">──────────────────────────────────────────────</text:span></text:p>
      <text:p text:style-name="Preformatted_20_Text"/>
      <text:p text:style-name="Preformatted_20_Text"><text:span text:style-name="Source_20_Text"><text:s text:c="16"/>SentinelAI</text:span></text:p>
      <text:p text:style-name="Preformatted_20_Text"/>
      <text:p text:style-name="Preformatted_20_Text"><text:span text:style-name="Source_20_Text"><text:s text:c="8"/>Enterprise Data Ingestion Engine</text:span></text:p>
      <text:p text:style-name="Preformatted_20_Text"/>
      <text:p text:style-name="Preformatted_20_Text"><text:span text:style-name="Source_20_Text">──────────────────────────────────────────────</text:span></text:p>
      <text:p text:style-name="Preformatted_20_Text"/>
      <text:p text:style-name="Preformatted_20_Text"><text:span text:style-name="Source_20_Text">Connector Manager</text:span></text:p>
      <text:p text:style-name="Preformatted_20_Text"/>
      <text:p text:style-name="Preformatted_20_Text"><text:span text:style-name="Source_20_Text">↓</text:span></text:p>
      <text:p text:style-name="Preformatted_20_Text"/>
      <text:p text:style-name="Preformatted_20_Text"><text:span text:style-name="Source_20_Text">Scheduler</text:span></text:p>
      <text:p text:style-name="Preformatted_20_Text"/>
      <text:p text:style-name="Preformatted_20_Text"><text:span text:style-name="Source_20_Text">↓</text:span></text:p>
      <text:p text:style-name="Preformatted_20_Text"/>
      <text:p text:style-name="Preformatted_20_Text"><text:span text:style-name="Source_20_Text">Connector Execution</text:span></text:p>
      <text:p text:style-name="Preformatted_20_Text"/>
      <text:p text:style-name="Preformatted_20_Text"><text:span text:style-name="Source_20_Text">↓</text:span></text:p>
      <text:p text:style-name="Preformatted_20_Text"/>
      <text:p text:style-name="Preformatted_20_Text"><text:span text:style-name="Source_20_Text">Collector</text:span></text:p>
      <text:p text:style-name="Preformatted_20_Text"/>
      <text:p text:style-name="Preformatted_20_Text"><text:span text:style-name="Source_20_Text">↓</text:span></text:p>
      <text:p text:style-name="Preformatted_20_Text"/>
      <text:p text:style-name="Preformatted_20_Text"><text:span text:style-name="Source_20_Text">Validator</text:span></text:p>
      <text:p text:style-name="Preformatted_20_Text"/>
      <text:p text:style-name="Preformatted_20_Text"><text:span text:style-name="Source_20_Text">↓</text:span></text:p>
      <text:p text:style-name="Preformatted_20_Text"/>
      <text:p text:style-name="Preformatted_20_Text"><text:span text:style-name="Source_20_Text">Deduplicator</text:span></text:p>
      <text:p text:style-name="Preformatted_20_Text"/>
      <text:p text:style-name="Preformatted_20_Text"><text:span text:style-name="Source_20_Text">↓</text:span></text:p>
      <text:p text:style-name="Preformatted_20_Text"/>
      <text:p text:style-name="Preformatted_20_Text"><text:span text:style-name="Source_20_Text">Metadata Enrichment</text:span></text:p>
      <text:p text:style-name="Preformatted_20_Text"/>
      <text:p text:style-name="Preformatted_20_Text"><text:span text:style-name="Source_20_Text">↓</text:span></text:p>
      <text:p text:style-name="Preformatted_20_Text"/>
      <text:p text:style-name="Preformatted_20_Text"><text:span text:style-name="Source_20_Text">Publisher</text:span></text:p>
      <text:p text:style-name="Preformatted_20_Text"/>
      <text:p text:style-name="Preformatted_20_Text"><text:span text:style-name="Source_20_Text">↓</text:span></text:p>
      <text:p text:style-name="Preformatted_20_Text"/>
      <text:p text:style-name="Preformatted_20_Text"><text:span text:style-name="Source_20_Text">Kafka</text:span></text:p>
      <text:p text:style-name="Preformatted_20_Text"/>
      <text:p text:style-name="Preformatted_20_Text"><text:span text:style-name="Source_20_Text">──────────────────────────────────────────────</text:span></text:p>
      <text:p text:style-name="Preformatted_20_Text"/>
      <text:p text:style-name="P1"><text:span text:style-name="Source_20_Text">Stage 2</text:span></text:p>
      <text:p text:style-name="Horizontal_20_Line"/>
      <text:h text:style-name="Heading_20_1" text:outline-level="1"><text:soft-page-break/>Imagine the demo starts</text:h>
      <text:p text:style-name="Text_20_body">Instead of showing code...</text:p>
      <text:p text:style-name="Text_20_body">Show your architecture.</text:p>
      <text:p text:style-name="Text_20_body">Then say:</text:p>
      <text:p text:style-name="Quotations">"Our enterprise contains multiple security products. Each product produces findings in a different format. Stage 1 continuously collects findings, validates them, removes duplicates, enriches them with metadata, and publishes them to our internal event bus."</text:p>
      <text:p text:style-name="Text_20_body">Now start the live flow.</text:p>
      <text:p text:style-name="Horizontal_20_Line"/>
      <text:h text:style-name="Heading_20_1" text:outline-level="1">Step 1 — Scheduler wakes up</text:h>
      <text:p text:style-name="Text_20_body">Your application is already running.</text:p>
      <text:p text:style-name="Text_20_body">On your terminal show something like:</text:p>
      <text:p text:style-name="Preformatted_20_Text"><text:span text:style-name="Source_20_Text">---------------------------------------------------</text:span></text:p>
      <text:p text:style-name="Preformatted_20_Text"/>
      <text:p text:style-name="Preformatted_20_Text"><text:span text:style-name="Source_20_Text">SentinelAI Enterprise Data Ingestion Engine</text:span></text:p>
      <text:p text:style-name="Preformatted_20_Text"/>
      <text:p text:style-name="Preformatted_20_Text"><text:span text:style-name="Source_20_Text">Status : Running</text:span></text:p>
      <text:p text:style-name="Preformatted_20_Text"/>
      <text:p text:style-name="Preformatted_20_Text"><text:span text:style-name="Source_20_Text">Connectors Loaded</text:span></text:p>
      <text:p text:style-name="Preformatted_20_Text"/>
      <text:p text:style-name="Preformatted_20_Text"><text:span text:style-name="Source_20_Text">AWS Security Hub ✔</text:span></text:p>
      <text:p text:style-name="Preformatted_20_Text"/>
      <text:p text:style-name="Preformatted_20_Text"><text:span text:style-name="Source_20_Text">Wazuh ✔</text:span></text:p>
      <text:p text:style-name="Preformatted_20_Text"/>
      <text:p text:style-name="Preformatted_20_Text"><text:span text:style-name="Source_20_Text">OpenVAS ✔</text:span></text:p>
      <text:p text:style-name="Preformatted_20_Text"/>
      <text:p text:style-name="Preformatted_20_Text"><text:span text:style-name="Source_20_Text">Suricata ✔</text:span></text:p>
      <text:p text:style-name="Preformatted_20_Text"/>
      <text:p text:style-name="Preformatted_20_Text"><text:span text:style-name="Source_20_Text">Scheduler Interval : 60 seconds</text:span></text:p>
      <text:p text:style-name="Preformatted_20_Text"/>
      <text:p text:style-name="P1"><text:span text:style-name="Source_20_Text">---------------------------------------------------</text:span></text:p>
      <text:p text:style-name="Text_20_body">Now after one minute:</text:p>
      <text:p text:style-name="Preformatted_20_Text"><text:span text:style-name="Source_20_Text">Scheduler Triggered</text:span></text:p>
      <text:p text:style-name="Preformatted_20_Text"/>
      <text:p text:style-name="P1"><text:span text:style-name="Source_20_Text">Running Connector Jobs...</text:span></text:p>
      <text:p text:style-name="Text_20_body">Explain:</text:p>
      <text:p text:style-name="Quotations">"The scheduler periodically triggers every connector independently. This design allows each connector to operate without blocking others."</text:p>
      <text:p text:style-name="Horizontal_20_Line"/>
      <text:h text:style-name="Heading_20_1" text:outline-level="1"><text:soft-page-break/>Step 2 — Connector Manager</text:h>
      <text:p text:style-name="Text_20_body">Now show:</text:p>
      <text:p text:style-name="Preformatted_20_Text"><text:span text:style-name="Source_20_Text">Scheduler</text:span></text:p>
      <text:p text:style-name="Preformatted_20_Text"/>
      <text:p text:style-name="Preformatted_20_Text"><text:span text:style-name="Source_20_Text">↓</text:span></text:p>
      <text:p text:style-name="Preformatted_20_Text"/>
      <text:p text:style-name="Preformatted_20_Text"><text:span text:style-name="Source_20_Text">Connector Manager</text:span></text:p>
      <text:p text:style-name="Preformatted_20_Text"/>
      <text:p text:style-name="Preformatted_20_Text"><text:span text:style-name="Source_20_Text">↓</text:span></text:p>
      <text:p text:style-name="Preformatted_20_Text"/>
      <text:p text:style-name="Preformatted_20_Text"><text:span text:style-name="Source_20_Text">Executing</text:span></text:p>
      <text:p text:style-name="Preformatted_20_Text"/>
      <text:p text:style-name="Preformatted_20_Text"><text:span text:style-name="Source_20_Text">AWS Connector</text:span></text:p>
      <text:p text:style-name="Preformatted_20_Text"/>
      <text:p text:style-name="Preformatted_20_Text"><text:span text:style-name="Source_20_Text">Executing</text:span></text:p>
      <text:p text:style-name="Preformatted_20_Text"/>
      <text:p text:style-name="Preformatted_20_Text"><text:span text:style-name="Source_20_Text">Wazuh Connector</text:span></text:p>
      <text:p text:style-name="Preformatted_20_Text"/>
      <text:p text:style-name="Preformatted_20_Text"><text:span text:style-name="Source_20_Text">Executing</text:span></text:p>
      <text:p text:style-name="Preformatted_20_Text"/>
      <text:p text:style-name="P1"><text:span text:style-name="Source_20_Text">OpenVAS Connector</text:span></text:p>
      <text:p text:style-name="Text_20_body">Explain:</text:p>
      <text:p text:style-name="Quotations">"The Connector Manager maintains the lifecycle of all connectors. New connectors can be added without changing the ingestion pipeline."</text:p>
      <text:p text:style-name="Text_20_body">This demonstrates scalability.</text:p>
      <text:p text:style-name="Horizontal_20_Line"/>
      <text:h text:style-name="Heading_20_1" text:outline-level="1">Step 3 — AWS Connector</text:h>
      <text:p text:style-name="Text_20_body">Now switch to AWS Console.</text:p>
      <text:p text:style-name="Text_20_body">Create a public S3 bucket.</text:p>
      <text:p text:style-name="Text_20_body">Wait.</text:p>
      <text:p text:style-name="Text_20_body">Security Hub detects it.</text:p>
      <text:p text:style-name="Text_20_body">Now return to your terminal.</text:p>
      <text:p text:style-name="Text_20_body">Show:</text:p>
      <text:p text:style-name="Preformatted_20_Text"><text:span text:style-name="Source_20_Text">AWS Connector</text:span></text:p>
      <text:p text:style-name="Preformatted_20_Text"/>
      <text:p text:style-name="Preformatted_20_Text"><text:span text:style-name="Source_20_Text">Connecting...</text:span></text:p>
      <text:p text:style-name="Preformatted_20_Text"/>
      <text:p text:style-name="Preformatted_20_Text"><text:span text:style-name="Source_20_Text">IAM Authentication Success</text:span></text:p>
      <text:p text:style-name="Preformatted_20_Text"/>
      <text:p text:style-name="Preformatted_20_Text"><text:span text:style-name="Source_20_Text">Calling Security Hub API</text:span></text:p>
      <text:p text:style-name="Preformatted_20_Text"/>
      <text:p text:style-name="Preformatted_20_Text"><text:span text:style-name="Source_20_Text">Fetching Findings...</text:span></text:p>
      <text:p text:style-name="Preformatted_20_Text"/>
      <text:p text:style-name="P1"><text:span text:style-name="Source_20_Text">1 Finding Received</text:span></text:p>
      <text:p text:style-name="Text_20_body"><text:soft-page-break/>Now show the JSON.</text:p>
      <text:p text:style-name="Preformatted_20_Text"><text:span text:style-name="Source_20_Text">{</text:span></text:p>
      <text:p text:style-name="Preformatted_20_Text"><text:span text:style-name="Source_20_Text"><text:s text:c="2"/>"Title": "S3 Bucket Public Read Access",</text:span></text:p>
      <text:p text:style-name="Preformatted_20_Text"><text:span text:style-name="Source_20_Text"><text:s text:c="2"/>"Severity": "HIGH",</text:span></text:p>
      <text:p text:style-name="Preformatted_20_Text"><text:span text:style-name="Source_20_Text"><text:s text:c="2"/>"AwsAccountId": "123456789",</text:span></text:p>
      <text:p text:style-name="Preformatted_20_Text"><text:span text:style-name="Source_20_Text"><text:s text:c="2"/>"Region": "ap-south-1",</text:span></text:p>
      <text:p text:style-name="Preformatted_20_Text"><text:span text:style-name="Source_20_Text"><text:s text:c="2"/>"Resource": "company-backup",</text:span></text:p>
      <text:p text:style-name="Preformatted_20_Text"><text:span text:style-name="Source_20_Text"><text:s text:c="2"/>"UpdatedAt": "2026-07-13T09:10:45Z"</text:span></text:p>
      <text:p text:style-name="P1"><text:span text:style-name="Source_20_Text">}</text:span></text:p>
      <text:p text:style-name="Text_20_body">Tell the audience:</text:p>
      <text:p text:style-name="Quotations">"This data comes directly from AWS Security Hub using the official AWS SDK. It is not simulated."</text:p>
      <text:p text:style-name="Text_20_body">That sentence is powerful.</text:p>
      <text:p text:style-name="Horizontal_20_Line"/>
      <text:h text:style-name="Heading_20_1" text:outline-level="1">Step 4 — Collector</text:h>
      <text:p text:style-name="Text_20_body">Now explain:</text:p>
      <text:p text:style-name="Text_20_body">The connector only downloads data.</text:p>
      <text:p text:style-name="Text_20_body">The Collector receives it.</text:p>
      <text:p text:style-name="Preformatted_20_Text"><text:span text:style-name="Source_20_Text">Collector</text:span></text:p>
      <text:p text:style-name="Preformatted_20_Text"/>
      <text:p text:style-name="Preformatted_20_Text"><text:span text:style-name="Source_20_Text">↓</text:span></text:p>
      <text:p text:style-name="Preformatted_20_Text"/>
      <text:p text:style-name="Preformatted_20_Text"><text:span text:style-name="Source_20_Text">Received</text:span></text:p>
      <text:p text:style-name="Preformatted_20_Text"/>
      <text:p text:style-name="P1"><text:span text:style-name="Source_20_Text">1 JSON Document</text:span></text:p>
      <text:p text:style-name="Text_20_body">If AWS returned 20 findings:</text:p>
      <text:p text:style-name="Preformatted_20_Text"><text:span text:style-name="Source_20_Text">Collector</text:span></text:p>
      <text:p text:style-name="Preformatted_20_Text"/>
      <text:p text:style-name="Preformatted_20_Text"><text:span text:style-name="Source_20_Text">↓</text:span></text:p>
      <text:p text:style-name="Preformatted_20_Text"/>
      <text:p text:style-name="Preformatted_20_Text"><text:span text:style-name="Source_20_Text">Received</text:span></text:p>
      <text:p text:style-name="Preformatted_20_Text"/>
      <text:p text:style-name="P1"><text:span text:style-name="Source_20_Text">20 Findings</text:span></text:p>
      <text:p text:style-name="Text_20_body">Collector does nothing intelligent.</text:p>
      <text:p text:style-name="Text_20_body">It simply transfers the data into the pipeline.</text:p>
      <text:p text:style-name="Horizontal_20_Line"/>
      <text:h text:style-name="Heading_20_1" text:outline-level="1">Step 5 — Validator</text:h>
      <text:p text:style-name="Text_20_body">Now the Validator checks whether the event is usable.</text:p>
      <text:p text:style-name="Text_20_body">Show:</text:p>
      <text:p text:style-name="Preformatted_20_Text"><text:soft-page-break/><text:span text:style-name="Source_20_Text">Validation Started</text:span></text:p>
      <text:p text:style-name="Preformatted_20_Text"/>
      <text:p text:style-name="Preformatted_20_Text"><text:span text:style-name="Source_20_Text">Checking Required Fields</text:span></text:p>
      <text:p text:style-name="Preformatted_20_Text"/>
      <text:p text:style-name="Preformatted_20_Text"><text:span text:style-name="Source_20_Text">✔ Title</text:span></text:p>
      <text:p text:style-name="Preformatted_20_Text"/>
      <text:p text:style-name="Preformatted_20_Text"><text:span text:style-name="Source_20_Text">✔ Severity</text:span></text:p>
      <text:p text:style-name="Preformatted_20_Text"/>
      <text:p text:style-name="Preformatted_20_Text"><text:span text:style-name="Source_20_Text">✔ Resource</text:span></text:p>
      <text:p text:style-name="Preformatted_20_Text"/>
      <text:p text:style-name="Preformatted_20_Text"><text:span text:style-name="Source_20_Text">✔ Timestamp</text:span></text:p>
      <text:p text:style-name="Preformatted_20_Text"/>
      <text:p text:style-name="Preformatted_20_Text"><text:span text:style-name="Source_20_Text">✔ Region</text:span></text:p>
      <text:p text:style-name="Preformatted_20_Text"/>
      <text:p text:style-name="P1"><text:span text:style-name="Source_20_Text">Validation Passed</text:span></text:p>
      <text:p text:style-name="Text_20_body">Suppose the event lacks a severity.</text:p>
      <text:p text:style-name="Text_20_body">Show:</text:p>
      <text:p text:style-name="Preformatted_20_Text"><text:span text:style-name="Source_20_Text">Validation Failed</text:span></text:p>
      <text:p text:style-name="Preformatted_20_Text"/>
      <text:p text:style-name="Preformatted_20_Text"><text:span text:style-name="Source_20_Text">Reason</text:span></text:p>
      <text:p text:style-name="Preformatted_20_Text"/>
      <text:p text:style-name="Preformatted_20_Text"><text:span text:style-name="Source_20_Text">Severity Missing</text:span></text:p>
      <text:p text:style-name="Preformatted_20_Text"/>
      <text:p text:style-name="P1"><text:span text:style-name="Source_20_Text">Discarding Event</text:span></text:p>
      <text:p text:style-name="Text_20_body">Explain:</text:p>
      <text:p text:style-name="Quotations">"Malformed or incomplete findings are rejected before entering the pipeline."</text:p>
      <text:p text:style-name="Text_20_body">Now the audience understands why validation exists.</text:p>
      <text:p text:style-name="Horizontal_20_Line"/>
      <text:h text:style-name="Heading_20_1" text:outline-level="1">Step 6 — Duplicate Detection</text:h>
      <text:p text:style-name="Text_20_body">Now poll AWS again.</text:p>
      <text:p text:style-name="Text_20_body">Security Hub returns the same finding.</text:p>
      <text:p text:style-name="Text_20_body">Your system prints:</text:p>
      <text:p text:style-name="Preformatted_20_Text"><text:span text:style-name="Source_20_Text">Duplicate Check</text:span></text:p>
      <text:p text:style-name="Preformatted_20_Text"/>
      <text:p text:style-name="Preformatted_20_Text"><text:span text:style-name="Source_20_Text">Finding ID</text:span></text:p>
      <text:p text:style-name="Preformatted_20_Text"/>
      <text:p text:style-name="Preformatted_20_Text"><text:span text:style-name="Source_20_Text">abc-123</text:span></text:p>
      <text:p text:style-name="Preformatted_20_Text"/>
      <text:p text:style-name="Preformatted_20_Text"><text:span text:style-name="Source_20_Text">Already Exists</text:span></text:p>
      <text:p text:style-name="Preformatted_20_Text"/>
      <text:p text:style-name="P1"><text:span text:style-name="Source_20_Text">Skipping</text:span></text:p>
      <text:p text:style-name="Text_20_body">Explain:</text:p>
      <text:p text:style-name="Quotations">"Security platforms often return the same finding multiple times. Duplicate detection ensures downstream stages process only new or updated events."</text:p>
      <text:p text:style-name="Text_20_body">This is a real-world concern and shows maturity.</text:p>
      <text:p text:style-name="Horizontal_20_Line"><text:soft-page-break/></text:p>
      <text:h text:style-name="Heading_20_1" text:outline-level="1">Step 7 — Metadata Enrichment</text:h>
      <text:p text:style-name="Text_20_body">Now enrich the event.</text:p>
      <text:p text:style-name="Text_20_body">Original:</text:p>
      <text:p text:style-name="Preformatted_20_Text"><text:span text:style-name="Source_20_Text">{</text:span></text:p>
      <text:p text:style-name="Preformatted_20_Text"><text:span text:style-name="Source_20_Text"><text:s/>"Title":"Public Bucket"</text:span></text:p>
      <text:p text:style-name="P1"><text:span text:style-name="Source_20_Text">}</text:span></text:p>
      <text:p text:style-name="Text_20_body">After enrichment:</text:p>
      <text:p text:style-name="Preformatted_20_Text"><text:span text:style-name="Source_20_Text">{</text:span></text:p>
      <text:p text:style-name="Preformatted_20_Text"><text:span text:style-name="Source_20_Text"><text:s/>"connector":"AWS",</text:span></text:p>
      <text:p text:style-name="Preformatted_20_Text"/>
      <text:p text:style-name="Preformatted_20_Text"><text:span text:style-name="Source_20_Text"><text:s/>"connector_version":"1.0",</text:span></text:p>
      <text:p text:style-name="Preformatted_20_Text"/>
      <text:p text:style-name="Preformatted_20_Text"><text:span text:style-name="Source_20_Text"><text:s/>"received_time":"2026-07-13T09:11:02",</text:span></text:p>
      <text:p text:style-name="Preformatted_20_Text"/>
      <text:p text:style-name="Preformatted_20_Text"><text:span text:style-name="Source_20_Text"><text:s/>"processing_node":"SentinelAI-01",</text:span></text:p>
      <text:p text:style-name="Preformatted_20_Text"/>
      <text:p text:style-name="Preformatted_20_Text"><text:span text:style-name="Source_20_Text"><text:s/>"environment":"Production",</text:span></text:p>
      <text:p text:style-name="Preformatted_20_Text"/>
      <text:p text:style-name="Preformatted_20_Text"><text:span text:style-name="Source_20_Text"><text:s/>"tenant":"ABC Enterprise",</text:span></text:p>
      <text:p text:style-name="Preformatted_20_Text"/>
      <text:p text:style-name="Preformatted_20_Text"><text:span text:style-name="Source_20_Text"><text:s/>"Title":"Public Bucket",</text:span></text:p>
      <text:p text:style-name="Preformatted_20_Text"/>
      <text:p text:style-name="Preformatted_20_Text"><text:span text:style-name="Source_20_Text"><text:s/>"Severity":"HIGH"</text:span></text:p>
      <text:p text:style-name="P1"><text:span text:style-name="Source_20_Text">}</text:span></text:p>
      <text:p text:style-name="Text_20_body">Explain:</text:p>
      <text:p text:style-name="Quotations">"We add operational metadata required for auditing, troubleshooting, and downstream analytics."</text:p>
      <text:p text:style-name="Horizontal_20_Line"/>
      <text:h text:style-name="Heading_20_1" text:outline-level="1">Step 8 — Publisher</text:h>
      <text:p text:style-name="Text_20_body">Now the event is ready.</text:p>
      <text:p text:style-name="Text_20_body">Show:</text:p>
      <text:p text:style-name="Preformatted_20_Text"><text:span text:style-name="Source_20_Text">Publishing Event</text:span></text:p>
      <text:p text:style-name="Preformatted_20_Text"/>
      <text:p text:style-name="Preformatted_20_Text"><text:span text:style-name="Source_20_Text">Topic</text:span></text:p>
      <text:p text:style-name="Preformatted_20_Text"/>
      <text:p text:style-name="Preformatted_20_Text"><text:span text:style-name="Source_20_Text">security.findings</text:span></text:p>
      <text:p text:style-name="Preformatted_20_Text"/>
      <text:p text:style-name="Preformatted_20_Text"><text:span text:style-name="Source_20_Text">Status</text:span></text:p>
      <text:p text:style-name="Preformatted_20_Text"/>
      <text:p text:style-name="P1"><text:span text:style-name="Source_20_Text">Success</text:span></text:p>
      <text:p text:style-name="Text_20_body">Then:</text:p>
      <text:p text:style-name="Preformatted_20_Text"><text:span text:style-name="Source_20_Text">Kafka Offset</text:span></text:p>
      <text:p text:style-name="Preformatted_20_Text"><text:soft-page-break/></text:p>
      <text:p text:style-name="P1"><text:span text:style-name="Source_20_Text">1084</text:span></text:p>
      <text:p text:style-name="Text_20_body">Immediately show the Kafka consumer.</text:p>
      <text:p text:style-name="Preformatted_20_Text"><text:span text:style-name="Source_20_Text">{</text:span></text:p>
      <text:p text:style-name="Preformatted_20_Text"><text:span text:style-name="Source_20_Text"><text:s/>"connector":"AWS",</text:span></text:p>
      <text:p text:style-name="Preformatted_20_Text"/>
      <text:p text:style-name="Preformatted_20_Text"><text:span text:style-name="Source_20_Text"><text:s/>"severity":"HIGH",</text:span></text:p>
      <text:p text:style-name="Preformatted_20_Text"/>
      <text:p text:style-name="Preformatted_20_Text"><text:span text:style-name="Source_20_Text"><text:s/>"resource":"company-backup",</text:span></text:p>
      <text:p text:style-name="Preformatted_20_Text"/>
      <text:p text:style-name="Preformatted_20_Text"><text:span text:style-name="Source_20_Text"><text:s/>"received_time":"09:11:02"</text:span></text:p>
      <text:p text:style-name="P1"><text:span text:style-name="Source_20_Text">}</text:span></text:p>
      <text:p text:style-name="Text_20_body">Now everyone sees the complete journey.</text:p>
      <text:p text:style-name="Horizontal_20_Line"/>
      <text:h text:style-name="Heading_20_1" text:outline-level="1">If multiple connectors exist</text:h>
      <text:p text:style-name="Text_20_body">Suppose Wazuh also sends something.</text:p>
      <text:p text:style-name="Text_20_body">Terminal:</text:p>
      <text:p text:style-name="Preformatted_20_Text"><text:span text:style-name="Source_20_Text">AWS Connector</text:span></text:p>
      <text:p text:style-name="Preformatted_20_Text"/>
      <text:p text:style-name="Preformatted_20_Text"><text:span text:style-name="Source_20_Text">1 Finding</text:span></text:p>
      <text:p text:style-name="Preformatted_20_Text"/>
      <text:p text:style-name="Preformatted_20_Text"><text:span text:style-name="Source_20_Text">Validation Success</text:span></text:p>
      <text:p text:style-name="Preformatted_20_Text"/>
      <text:p text:style-name="Preformatted_20_Text"><text:span text:style-name="Source_20_Text">Published</text:span></text:p>
      <text:p text:style-name="Preformatted_20_Text"/>
      <text:p text:style-name="Preformatted_20_Text"><text:span text:style-name="Source_20_Text">------------------------</text:span></text:p>
      <text:p text:style-name="Preformatted_20_Text"/>
      <text:p text:style-name="Preformatted_20_Text"><text:span text:style-name="Source_20_Text">Wazuh Connector</text:span></text:p>
      <text:p text:style-name="Preformatted_20_Text"/>
      <text:p text:style-name="Preformatted_20_Text"><text:span text:style-name="Source_20_Text">3 Events</text:span></text:p>
      <text:p text:style-name="Preformatted_20_Text"/>
      <text:p text:style-name="Preformatted_20_Text"><text:span text:style-name="Source_20_Text">Validation Success</text:span></text:p>
      <text:p text:style-name="Preformatted_20_Text"/>
      <text:p text:style-name="Preformatted_20_Text"><text:span text:style-name="Source_20_Text">Published</text:span></text:p>
      <text:p text:style-name="Preformatted_20_Text"/>
      <text:p text:style-name="Preformatted_20_Text"><text:span text:style-name="Source_20_Text">------------------------</text:span></text:p>
      <text:p text:style-name="Preformatted_20_Text"/>
      <text:p text:style-name="Preformatted_20_Text"><text:span text:style-name="Source_20_Text">OpenVAS</text:span></text:p>
      <text:p text:style-name="Preformatted_20_Text"/>
      <text:p text:style-name="Preformatted_20_Text"><text:span text:style-name="Source_20_Text">2 Vulnerabilities</text:span></text:p>
      <text:p text:style-name="Preformatted_20_Text"/>
      <text:p text:style-name="P1"><text:span text:style-name="Source_20_Text">Published</text:span></text:p>
      <text:p text:style-name="Text_20_body">Now Kafka receives</text:p>
      <text:p text:style-name="Preformatted_20_Text"><text:span text:style-name="Source_20_Text">AWS</text:span></text:p>
      <text:p text:style-name="Preformatted_20_Text"/>
      <text:p text:style-name="Preformatted_20_Text"><text:span text:style-name="Source_20_Text">↓</text:span></text:p>
      <text:p text:style-name="Preformatted_20_Text"/>
      <text:p text:style-name="Preformatted_20_Text"><text:span text:style-name="Source_20_Text">Topic</text:span></text:p>
      <text:p text:style-name="Preformatted_20_Text"/>
      <text:p text:style-name="Preformatted_20_Text"><text:span text:style-name="Source_20_Text">security.findings</text:span></text:p>
      <text:p text:style-name="Preformatted_20_Text"/>
      <text:p text:style-name="Preformatted_20_Text"><text:soft-page-break/><text:span text:style-name="Source_20_Text">----------------</text:span></text:p>
      <text:p text:style-name="Preformatted_20_Text"/>
      <text:p text:style-name="Preformatted_20_Text"><text:span text:style-name="Source_20_Text">Wazuh</text:span></text:p>
      <text:p text:style-name="Preformatted_20_Text"/>
      <text:p text:style-name="Preformatted_20_Text"><text:span text:style-name="Source_20_Text">↓</text:span></text:p>
      <text:p text:style-name="Preformatted_20_Text"/>
      <text:p text:style-name="Preformatted_20_Text"><text:span text:style-name="Source_20_Text">Topic</text:span></text:p>
      <text:p text:style-name="Preformatted_20_Text"/>
      <text:p text:style-name="Preformatted_20_Text"><text:span text:style-name="Source_20_Text">security.findings</text:span></text:p>
      <text:p text:style-name="Preformatted_20_Text"/>
      <text:p text:style-name="Preformatted_20_Text"><text:span text:style-name="Source_20_Text">----------------</text:span></text:p>
      <text:p text:style-name="Preformatted_20_Text"/>
      <text:p text:style-name="Preformatted_20_Text"><text:span text:style-name="Source_20_Text">OpenVAS</text:span></text:p>
      <text:p text:style-name="Preformatted_20_Text"/>
      <text:p text:style-name="Preformatted_20_Text"><text:span text:style-name="Source_20_Text">↓</text:span></text:p>
      <text:p text:style-name="Preformatted_20_Text"/>
      <text:p text:style-name="Preformatted_20_Text"><text:span text:style-name="Source_20_Text">Topic</text:span></text:p>
      <text:p text:style-name="Preformatted_20_Text"/>
      <text:p text:style-name="P1"><text:span text:style-name="Source_20_Text">security.findings</text:span></text:p>
      <text:p text:style-name="Text_20_body">Everything goes into the same event stream.</text:p>
      <text:p text:style-name="Horizontal_20_Line"/>
      <text:h text:style-name="Heading_20_1" text:outline-level="1">Live Demo Timeline (5–7 minutes)</text:h>
      <text:list text:style-name="L46">
        <text:list-item>
          <text:p text:style-name="P47"><text:span text:style-name="Strong_20_Emphasis">Introduce the enterprise</text:span>: Show the architecture diagram with AWS, Wazuh, OpenVAS, etc., feeding into SentinelAI Stage 1.</text:p>
        </text:list-item>
        <text:list-item>
          <text:p text:style-name="P47"><text:span text:style-name="Strong_20_Emphasis">Start the ingestion engine</text:span>: Display the terminal showing connectors loaded and the scheduler waiting.</text:p>
        </text:list-item>
        <text:list-item>
          <text:p text:style-name="P47"><text:span text:style-name="Strong_20_Emphasis">Create a real event</text:span>: In AWS, make an S3 bucket public (or another controlled misconfiguration).</text:p>
        </text:list-item>
        <text:list-item>
          <text:p text:style-name="P47"><text:span text:style-name="Strong_20_Emphasis">Watch Stage 1 react</text:span>:</text:p>
          <text:list>
            <text:list-item>
              <text:p text:style-name="P47">Scheduler triggers.</text:p>
            </text:list-item>
            <text:list-item>
              <text:p text:style-name="P47">AWS Connector authenticates and calls Security Hub.</text:p>
            </text:list-item>
            <text:list-item>
              <text:p text:style-name="P47">Collector receives one finding.</text:p>
            </text:list-item>
            <text:list-item>
              <text:p text:style-name="P47">Validator checks required fields.</text:p>
            </text:list-item>
            <text:list-item>
              <text:p text:style-name="P47">Deduplicator confirms it's new.</text:p>
            </text:list-item>
            <text:list-item>
              <text:p text:style-name="P47">Metadata Enrichment adds operational context.</text:p>
            </text:list-item>
            <text:list-item>
              <text:p text:style-name="P47">Publisher sends it to Kafka.</text:p>
            </text:list-item>
          </text:list>
        </text:list-item>
        <text:list-item>
          <text:p text:style-name="P47"><text:span text:style-name="Strong_20_Emphasis">Verify delivery</text:span>: Show the Kafka consumer receiving the enriched event.</text:p>
        </text:list-item>
        <text:list-item>
          <text:p text:style-name="P47"><text:span text:style-name="Strong_20_Emphasis">Transition</text:span>: Say, "Stage 1's job ends here. From this point onward, Stage 2 is responsible for understanding and standardizing the event."</text:p>
        </text:list-item>
      </text:list>
      <text:p text:style-name="Horizontal_20_Line"/>
      <text:h text:style-name="Heading_20_2" text:outline-level="2"><text:soft-page-break/>What makes the demo feel professional?</text:h>
      <text:p text:style-name="Text_20_body">Don't just print logs like:</text:p>
      <text:p text:style-name="Preformatted_20_Text"><text:span text:style-name="Source_20_Text">Received event.</text:span></text:p>
      <text:p text:style-name="P1"><text:span text:style-name="Source_20_Text">Done.</text:span></text:p>
      <text:p text:style-name="Text_20_body">Instead, show each processing stage with timestamps, success/failure status, and the data before and after key transformations. That gives the audience the feeling that they're watching a real enterprise ingestion engine, not a script.</text:p>
      <text:p text:style-name="Text_20_body">By the end of the Stage 1 demo, the audience should be able to answer these questions without asking you:</text:p>
      <text:list text:style-name="L47">
        <text:list-item>
          <text:p text:style-name="P48"><text:span text:style-name="Strong_20_Emphasis">Where did the event come from?</text:span> (AWS Security Hub, Wazuh, OpenVAS, etc.)</text:p>
        </text:list-item>
        <text:list-item>
          <text:p text:style-name="P48"><text:span text:style-name="Strong_20_Emphasis">How was it collected?</text:span> (Connector triggered by the Scheduler)</text:p>
        </text:list-item>
        <text:list-item>
          <text:p text:style-name="P48"><text:span text:style-name="Strong_20_Emphasis">How was it verified?</text:span> (Validator)</text:p>
        </text:list-item>
        <text:list-item>
          <text:p text:style-name="P48"><text:span text:style-name="Strong_20_Emphasis">How were duplicates prevented?</text:span> (Deduplicator)</text:p>
        </text:list-item>
        <text:list-item>
          <text:p text:style-name="P48"><text:span text:style-name="Strong_20_Emphasis">What extra information was added?</text:span> (Metadata Enrichment)</text:p>
        </text:list-item>
        <text:list-item>
          <text:p text:style-name="P48"><text:span text:style-name="Strong_20_Emphasis">How was it delivered to the rest of the platform?</text:span> (Kafka Publisher)</text:p>
        </text:list-item>
      </text:list>
      <text:p text:style-name="Text_20_body">If they can answer those questions after your demo, you've successfully demonstrated Stage 1 as an enterprise-grade ingestion engine rather than just an API integration.<text:line-break/><text:span text:style-name="T3">SIMULATION</text:span></text:p>
      <text:p text:style-name="Text_20_body"><text:span text:style-name="T3">Real talk first: the 11-week plan doesn't fit into 5 days, even loosely. Something has to be cut, not just compressed. Here's what I'd actually do if I had 5 days and intermediate-level skills — this assumes you're building mostly solo (or leading a team but doing the heavy lifting yourself), starting from a blank laptop, no existing AWS setup.</text:span></text:p>
      <text:h text:style-name="Heading_20_2" text:outline-level="2">What gets cut and why</text:h>
      <table:table table:name="Table1" table:style-name="Table1">
        <table:table-column table:style-name="Table1.A"/>
        <table:table-column table:style-name="Table1.B"/>
        <table:table-header-rows>
          <table:table-row>
            <table:table-cell table:style-name="Table1.A1" office:value-type="string">
              <text:p text:style-name="Table_20_Heading">Cut from original plan</text:p>
            </table:table-cell>
            <table:table-cell table:style-name="Table1.A1" office:value-type="string">
              <text:p text:style-name="Table_20_Heading">Why</text:p>
            </table:table-cell>
          </table:table-row>
        </table:table-header-rows>
        <table:table-row>
          <table:table-cell table:style-name="Table1.A1" office:value-type="string">
            <text:p text:style-name="Table_20_Contents"><text:span text:style-name="Strong_20_Emphasis">Kafka</text:span></text:p>
          </table:table-cell>
          <table:table-cell table:style-name="Table1.A1" office:value-type="string">
            <text:p text:style-name="Table_20_Contents">Real operational complexity (partitions, consumer groups) — not worth it in 5 days. Replace with a Python script polling Wazuh's REST API + SQLite. Functionally the same demo, 1/10th the setup time.</text:p>
          </table:table-cell>
        </table:table-row>
        <table:table-row>
          <table:table-cell table:style-name="Table1.A1" office:value-type="string">
            <text:p text:style-name="Table_20_Contents"><text:span text:style-name="Strong_20_Emphasis">AWS Security Hub </text:span><text:soft-page-break/><text:span text:style-name="Strong_20_Emphasis">(live)</text:span></text:p>
          </table:table-cell>
          <table:table-cell table:style-name="Table1.A1" office:value-type="string">
            <text:p text:style-name="Table_20_Contents">Account setup, IAM permissions, billing risk, and it needs internet at demo <text:soft-page-break/>time. Either mock it (fake finding JSON that looks real) or drop it and mention it as "designed for, simplified for time" if a judge asks — that's an honest, acceptable answer.</text:p>
          </table:table-cell>
        </table:table-row>
        <table:table-row>
          <table:table-cell table:style-name="Table1.A1" office:value-type="string">
            <text:p text:style-name="Table_20_Contents"><text:span text:style-name="Strong_20_Emphasis">4 separate VMs</text:span></text:p>
          </table:table-cell>
          <table:table-cell table:style-name="Table1.A1" office:value-type="string">
            <text:p text:style-name="Table_20_Contents">Use <text:span text:style-name="Strong_20_Emphasis">Wazuh's official single-node Docker Compose quickstart</text:span> — installs in ~20 minutes instead of hours of manual server setup. Only 2 VMs needed: Attacker + Target.</text:p>
          </table:table-cell>
        </table:table-row>
        <table:table-row>
          <table:table-cell table:style-name="Table1.A1" office:value-type="string">
            <text:p text:style-name="Table_20_Contents"><text:span text:style-name="Strong_20_Emphasis">Custom OpenVAS automation/API wrapper</text:span></text:p>
          </table:table-cell>
          <table:table-cell table:style-name="Table1.A1" office:value-type="string">
            <text:p text:style-name="Table_20_Contents">Run OpenVAS in Docker, do ONE scan, cache the report. Don't build live API polling for it — not worth the time for one static data point in your demo.</text:p>
          </table:table-cell>
        </table:table-row>
      </table:table>
      <text:h text:style-name="Heading_20_2" text:outline-level="2">The 5-day plan</text:h>
      <text:h text:style-name="Heading_20_3" text:outline-level="3">Day 1 — Environment (this is the day most people get stuck, so go slow and methodical)</text:h>
      <table:table table:name="Table3" table:style-name="Table3">
        <table:table-column table:style-name="Table3.A"/>
        <table:table-column table:style-name="Table3.B"/>
        <table:table-header-rows>
          <table:table-row>
            <table:table-cell table:style-name="Table3.A1" office:value-type="string">
              <text:p text:style-name="Table_20_Heading">Time</text:p>
            </table:table-cell>
            <table:table-cell table:style-name="Table3.A1" office:value-type="string">
              <text:p text:style-name="Table_20_Heading">Task</text:p>
            </table:table-cell>
          </table:table-row>
        </table:table-header-rows>
        <table:table-row>
          <table:table-cell table:style-name="Table3.A1" office:value-type="string">
            <text:p text:style-name="Table_20_Contents">Morning</text:p>
          </table:table-cell>
          <table:table-cell table:style-name="Table3.A1" office:value-type="string">
            <text:p text:style-name="Table_20_Contents">Install VirtualBox. Create 2 VMs: <text:span text:style-name="Strong_20_Emphasis">Attacker</text:span> (Kali or plain Ubuntu + <text:span text:style-name="Source_20_Text">nmap</text:span>, <text:span text:style-name="Source_20_Text">hydra</text:span>) and <text:span text:style-name="Strong_20_Emphasis">Target</text:span> (Ubuntu Server + Apache 2.4.x an old version + OpenSSH). Put both on a host-only network.</text:p>
          </table:table-cell>
        </table:table-row>
        <table:table-row>
          <table:table-cell table:style-name="Table3.A1" office:value-type="string">
            <text:p text:style-name="Table_20_Contents">Midday</text:p>
          </table:table-cell>
          <table:table-cell table:style-name="Table3.A1" office:value-type="string">
            <text:p text:style-name="Table_20_Contents">Install Docker + Docker Compose on your host machine (not inside the VMs). Deploy <text:span text:style-name="Strong_20_Emphasis">Wazuh single-node via their official Docker Compose quickstart</text:span> — this is the fastest path to a working manager+indexer+dashboard.</text:p>
          </table:table-cell>
        </table:table-row>
        <table:table-row>
          <table:table-cell table:style-name="Table3.A1" office:value-type="string">
            <text:p text:style-name="Table_20_Contents">Afternoon</text:p>
          </table:table-cell>
          <table:table-cell table:style-name="Table3.A1" office:value-type="string">
            <text:p text:style-name="Table_20_Contents">Enroll the Target VM as a Wazuh agent (one command from the dashboard's "Add agent" wizard). Confirm you see heartbeat data.</text:p>
          </table:table-cell>
        </table:table-row>
        <table:table-row>
          <table:table-cell table:style-name="Table3.A1" office:value-type="string">
            <text:p text:style-name="Table_20_Contents">Evening</text:p>
          </table:table-cell>
          <table:table-cell table:style-name="Table3.A1" office:value-type="string">
            <text:p text:style-name="Table_20_Contents">Install Suricata on the Target VM. Enable <text:span text:style-name="Source_20_Text">eve.json</text:span> output in <text:span text:style-name="Source_20_Text">suricata.yaml</text:span>. Add a <text:span text:style-name="Source_20_Text">&lt;localfile&gt;</text:span> block on the Wazuh agent config pointing at <text:span text:style-name="Source_20_Text">eve.json</text:span> (don't touch existing blocks — add a new one). Restart agent.</text:p>
          </table:table-cell>
        </table:table-row>
        <table:table-row>
          <table:table-cell table:style-name="Table3.A1" office:value-type="string">
            <text:p text:style-name="Table_20_Contents"><text:span text:style-name="Strong_20_Emphasis">Checkpoint before bed</text:span></text:p>
          </table:table-cell>
          <table:table-cell table:style-name="Table3.A1" office:value-type="string">
            <text:p text:style-name="Table_20_Contents">From Attacker VM: <text:span text:style-name="Source_20_Text">nmap -sS &lt;target-ip&gt;</text:span>. You must see a Suricata alert land in the Wazuh dashboard. If not, stop — this is not a step you can skip past broken. Debug now, not Day 3.</text:p>
          </table:table-cell>
        </table:table-row>
        <table:table-row>
          <table:table-cell table:style-name="Table3.A1" office:value-type="string">
            <text:p text:style-name="Table_20_Contents">Also kick off overnight</text:p>
          </table:table-cell>
          <table:table-cell table:style-name="Table3.A1" office:value-type="string">
            <text:p text:style-name="Table_20_Contents">Start OpenVAS in Docker (<text:span text:style-name="Source_20_Text">mikesplain/openvas</text:span> or similar image), let the NVT feed sync overnight (it's slow), and queue a scan against the Target VM so it's done by morning.</text:p>
          </table:table-cell>
        </table:table-row>
      </table:table>
      <text:h text:style-name="Heading_20_3" text:outline-level="3">Day 2 — Full local attack chain, no AI yet</text:h>
      <text:list text:style-name="L48">
        <text:list-item>
          <text:p text:style-name="P50">Run <text:span text:style-name="Source_20_Text">hydra -l john -P wordlist.txt ssh://&lt;target&gt;</text:span> → confirm Wazuh's default SSH brute-force rule fires. </text:p>
        </text:list-item>
        <text:list-item>
          <text:p text:style-name="P50">SSH in successfully right after → confirm Wazuh logs the successful login. </text:p>
        </text:list-item>
        <text:list-item>
          <text:p text:style-name="P50"><text:span text:style-name="Source_20_Text">sudo useradd new_admin</text:span> on target → confirm Wazuh's rule (or a quick custom rule watching <text:span text:style-name="Source_20_Text">/etc/passwd</text:span> via syscheck) fires on privilege escalation. </text:p>
        </text:list-item>
        <text:list-item>
          <text:p text:style-name="P50">Pull the OpenVAS report from overnight — confirm it shows a CVE with a CVSS score for the Apache version. </text:p>
        </text:list-item>
        <text:list-item>
          <text:p text:style-name="P49"><text:span text:style-name="Strong_20_Emphasis">By end of Day 2:</text:span> every step of your attack story produces a real alert in Wazuh, manually, and you can trigger the whole chain in under 2 minutes. This is your safety net even if nothing else gets built. </text:p>
        </text:list-item>
      </text:list>
      <text:h text:style-name="Heading_20_3" text:outline-level="3"><text:soft-page-break/>Day 3 — Correlation layer (skip Kafka)</text:h>
      <text:list text:style-name="L49">
        <text:list-item>
          <text:p text:style-name="P52">Python script using Wazuh's REST API (or tailing the alerts JSON log directly — simpler) that polls every few seconds. </text:p>
        </text:list-item>
        <text:list-item>
          <text:p text:style-name="P52">Normalize each alert into one schema: <text:span text:style-name="Source_20_Text">{timestamp, source_tool, severity, src_ip, description, raw}</text:span>. </text:p>
        </text:list-item>
        <text:list-item>
          <text:p text:style-name="P52">Group events by <text:span text:style-name="Source_20_Text">src_ip</text:span> within a time window (e.g., last 30 min) into an ordered list = your "event chain." </text:p>
        </text:list-item>
        <text:list-item>
          <text:p text:style-name="P52">Tag each with a MITRE ATT&amp;CK ID using a hardcoded lookup dict (port scan → T1595, brute force → T1110, priv esc → T1548) — you don't need a fancy taxonomy library for this, a dict is fine and looks just as credible to a judge. </text:p>
        </text:list-item>
        <text:list-item>
          <text:p text:style-name="P51">Store the chain as JSON — that JSON is what Stage 3 will consume. </text:p>
        </text:list-item>
      </text:list>
      <text:h text:style-name="Heading_20_3" text:outline-level="3">Day 4 — AI narrative + minimal dashboard</text:h>
      <text:list text:style-name="L50">
        <text:list-item>
          <text:p text:style-name="P54">Use the Anthropic API. <text:span text:style-name="Strong_20_Emphasis">Do not</text:span> dump raw logs into one prompt — feed it the clean, correlated JSON chain from Day 3 and ask for two things in one structured call: (1) confirm/tag each step with its MITRE technique, (2) write a 3–4 sentence plain-English narrative connecting them. </text:p>
        </text:list-item>
        <text:list-item>
          <text:p text:style-name="P54">This two-step structure (clean input → constrained output) is what separates "works" from "hallucinates" per the research I cited earlier — you don't need a full multi-agent pipeline in 5 days, just don't feed it raw noise. </text:p>
        </text:list-item>
        <text:list-item>
          <text:p text:style-name="P53">Dashboard: don't build React. A single Flask or Streamlit page that shows the timeline (just a styled list) + the AI paragraph is enough, and Streamlit especially is fast to get looking clean with minimal code. </text:p>
        </text:list-item>
      </text:list>
      <text:h text:style-name="Heading_20_3" text:outline-level="3">Day 5 — Rehearse, record backup, prep answers</text:h>
      <text:list text:style-name="L51">
        <text:list-item>
          <text:p text:style-name="P56">Run the full chain live, start to finish, at least 5 times. Time it — aim for under 5 minutes. </text:p>
        </text:list-item>
        <text:list-item>
          <text:p text:style-name="P56">Record one full successful run as a backup video. </text:p>
        </text:list-item>
        <text:list-item>
          <text:p text:style-name="P56">Write your 60-second opening line and rehearse the "if this breaks, here's the recording" transition — practice it, don't wing it. </text:p>
        </text:list-item>
        <text:list-item>
          <text:p text:style-name="P55">Prepare your honest answer for "what about AWS/cloud?" and "why no Kafka?" — say what you cut and why, judges respect an intermediate builder who scoped realistically over one who overclaims and then can't show it working. </text:p>
        </text:list-item>
      </text:list>
      <text:h text:style-name="Heading_20_2" text:outline-level="2">One honest note</text:h>
      <text:p text:style-name="Text_20_body">If you're doing this <text:span text:style-name="Strong_20_Emphasis">completely solo</text:span> in 5 days, even this trimmed version is tight — Day 1 alone eats a full day for most people the first time they wire Wazuh+Suricata together. If you slip, the priority order to protect is: <text:span text:style-name="Strong_20_Emphasis">Day 1–2 (the real attack chain) &gt; Day 3 (correlation) &gt; Day 4 (AI narrative)</text:span>. A working manual attack chain with no AI is still a legitimate, demoable project. A half-built AI layer on top of a broken detection chain is not.</text:p>
      <text:p text:style-name="Text_20_body">Want me to write out the actual Wazuh Docker Compose commands and the Python normalizer/correlator script now, so you can start Day 1 immediately?</text:p>
      <text:p text:style-name="Text_20_body"><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13T11:17:13.393888467</meta:creation-date>
    <dc:date>2026-07-13T19:52:37.388812210</dc:date>
    <meta:editing-duration>PT44M44S</meta:editing-duration>
    <meta:editing-cycles>2</meta:editing-cycles>
    <meta:generator>LibreOffice/24.2.7.2$Linux_X86_64 LibreOffice_project/420$Build-2</meta:generator>
    <meta:document-statistic meta:table-count="3" meta:image-count="0" meta:object-count="0" meta:page-count="25" meta:paragraph-count="683" meta:word-count="3151" meta:character-count="20767" meta:non-whitespace-character-count="17388"/>
  </office:meta>
</office:document-meta>
</file>